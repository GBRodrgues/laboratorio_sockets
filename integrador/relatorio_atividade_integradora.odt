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ela1" style:family="table">
      <style:table-properties style:width="16.591cm" fo:margin-top="0cm" fo:margin-bottom="0cm" table:align="center" style:writing-mode="page"/>
    </style:style>
    <style:style style:name="Tabela1.A" style:family="table-column">
      <style:table-column-properties style:column-width="16.591cm"/>
    </style:style>
    <style:style style:name="Tabela1.1" style:family="table-row">
      <style:table-row-properties fo:keep-together="auto"/>
    </style:style>
    <style:style style:name="Tabela1.A1" style:family="table-cell">
      <style:table-cell-properties fo:background-color="#f2f2f2" fo:padding="0.141cm" fo:border="none">
        <style:background-image/>
      </style:table-cell-properties>
    </style:style>
    <style:style style:name="Tabela2" style:family="table">
      <style:table-properties style:width="16.609cm" fo:margin-top="0cm" fo:margin-bottom="0cm" table:align="center" style:writing-mode="lr-tb"/>
    </style:style>
    <style:style style:name="Tabela2.A" style:family="table-column">
      <style:table-column-properties style:column-width="8.32cm"/>
    </style:style>
    <style:style style:name="Tabela2.B" style:family="table-column">
      <style:table-column-properties style:column-width="8.289cm"/>
    </style:style>
    <style:style style:name="Tabela2.1" style:family="table-row">
      <style:table-row-properties fo:keep-together="auto"/>
    </style:style>
    <style:style style:name="Tabela2.A1" style:family="table-cell">
      <style:table-cell-properties fo:background-color="#808080" fo:padding-left="0.191cm" fo:padding-right="0.191cm" fo:padding-top="0cm" fo:padding-bottom="0cm" fo:border="0.5pt solid #000000" style:writing-mode="lr-tb">
        <style:background-image/>
      </style:table-cell-properties>
    </style:style>
    <style:style style:name="Tabela2.A2" style:family="table-cell">
      <style:table-cell-properties fo:padding-left="0.191cm" fo:padding-right="0.191cm" fo:padding-top="0cm" fo:padding-bottom="0cm" fo:border="0.5pt solid #000000" style:writing-mode="lr-tb"/>
    </style:style>
    <style:style style:name="Tabela2.B2" style:family="table-cell">
      <style:table-cell-properties fo:padding-left="0.191cm" fo:padding-right="0.191cm" fo:padding-top="0cm" fo:padding-bottom="0cm" fo:border="0.5pt solid #000000" style:writing-mode="lr-tb"/>
    </style:style>
    <style:style style:name="Tabela2.A3" style:family="table-cell">
      <style:table-cell-properties fo:padding-left="0.191cm" fo:padding-right="0.191cm" fo:padding-top="0cm" fo:padding-bottom="0cm" fo:border="0.5pt solid #000000" style:writing-mode="lr-tb"/>
    </style:style>
    <style:style style:name="Tabela2.B3" style:family="table-cell">
      <style:table-cell-properties fo:padding-left="0.191cm" fo:padding-right="0.191cm" fo:padding-top="0cm" fo:padding-bottom="0cm" fo:border="0.5pt solid #000000" style:writing-mode="lr-tb"/>
    </style:style>
    <style:style style:name="Tabela2.A4" style:family="table-cell">
      <style:table-cell-properties fo:padding-left="0.191cm" fo:padding-right="0.191cm" fo:padding-top="0cm" fo:padding-bottom="0cm" fo:border="0.5pt solid #000000" style:writing-mode="lr-tb"/>
    </style:style>
    <style:style style:name="Tabela2.B4" style:family="table-cell">
      <style:table-cell-properties fo:padding-left="0.191cm" fo:padding-right="0.191cm" fo:padding-top="0cm" fo:padding-bottom="0cm" fo:border="0.5pt solid #000000" style:writing-mode="lr-tb"/>
    </style:style>
    <style:style style:name="Tabela2.A5" style:family="table-cell">
      <style:table-cell-properties fo:padding-left="0.191cm" fo:padding-right="0.191cm" fo:padding-top="0cm" fo:padding-bottom="0cm" fo:border="0.5pt solid #000000" style:writing-mode="lr-tb"/>
    </style:style>
    <style:style style:name="Tabela2.B5" style:family="table-cell">
      <style:table-cell-properties fo:padding-left="0.191cm" fo:padding-right="0.191cm" fo:padding-top="0cm" fo:padding-bottom="0cm" fo:border="0.5pt solid #000000" style:writing-mode="lr-tb"/>
    </style:style>
    <style:style style:name="Tabela2.A6" style:family="table-cell">
      <style:table-cell-properties fo:padding-left="0.191cm" fo:padding-right="0.191cm" fo:padding-top="0cm" fo:padding-bottom="0cm" fo:border="0.5pt solid #000000" style:writing-mode="lr-tb"/>
    </style:style>
    <style:style style:name="Tabela2.B6" style:family="table-cell">
      <style:table-cell-properties fo:padding-left="0.191cm" fo:padding-right="0.191cm" fo:padding-top="0cm" fo:padding-bottom="0cm" fo:border="0.5pt solid #000000" style:writing-mode="lr-tb"/>
    </style:style>
    <style:style style:name="Tabela3" style:family="table">
      <style:table-properties style:width="16.552cm" fo:margin-top="0cm" fo:margin-bottom="0cm" table:align="center" style:writing-mode="lr-tb"/>
    </style:style>
    <style:style style:name="Tabela3.A" style:family="table-column">
      <style:table-column-properties style:column-width="4.106cm"/>
    </style:style>
    <style:style style:name="Tabela3.B" style:family="table-column">
      <style:table-column-properties style:column-width="4.159cm"/>
    </style:style>
    <style:style style:name="Tabela3.C" style:family="table-column">
      <style:table-column-properties style:column-width="4.142cm"/>
    </style:style>
    <style:style style:name="Tabela3.D" style:family="table-column">
      <style:table-column-properties style:column-width="4.145cm"/>
    </style:style>
    <style:style style:name="Tabela3.1" style:family="table-row">
      <style:table-row-properties fo:keep-together="auto"/>
    </style:style>
    <style:style style:name="Tabela3.A1" style:family="table-cell">
      <style:table-cell-properties fo:background-color="#808080" fo:padding-left="0.191cm" fo:padding-right="0.191cm" fo:padding-top="0cm" fo:padding-bottom="0cm" fo:border="0.5pt solid #000000" style:writing-mode="lr-tb">
        <style:background-image/>
      </style:table-cell-properties>
    </style:style>
    <style:style style:name="Tabela3.A2" style:family="table-cell">
      <style:table-cell-properties fo:padding-left="0.191cm" fo:padding-right="0.191cm" fo:padding-top="0cm" fo:padding-bottom="0cm" fo:border="0.5pt solid #000000" style:writing-mode="lr-tb"/>
    </style:style>
    <style:style style:name="Tabela3.B2" style:family="table-cell">
      <style:table-cell-properties fo:padding-left="0.191cm" fo:padding-right="0.191cm" fo:padding-top="0cm" fo:padding-bottom="0cm" fo:border="0.5pt solid #000000" style:writing-mode="lr-tb"/>
    </style:style>
    <style:style style:name="Tabela3.C2" style:family="table-cell">
      <style:table-cell-properties fo:padding-left="0.191cm" fo:padding-right="0.191cm" fo:padding-top="0cm" fo:padding-bottom="0cm" fo:border="0.5pt solid #000000" style:writing-mode="lr-tb"/>
    </style:style>
    <style:style style:name="Tabela3.D2" style:family="table-cell">
      <style:table-cell-properties fo:padding-left="0.191cm" fo:padding-right="0.191cm" fo:padding-top="0cm" fo:padding-bottom="0cm" fo:border="0.5pt solid #000000" style:writing-mode="lr-tb"/>
    </style:style>
    <style:style style:name="Tabela3.A3" style:family="table-cell">
      <style:table-cell-properties fo:padding-left="0.191cm" fo:padding-right="0.191cm" fo:padding-top="0cm" fo:padding-bottom="0cm" fo:border="0.5pt solid #000000" style:writing-mode="lr-tb"/>
    </style:style>
    <style:style style:name="Tabela3.B3" style:family="table-cell">
      <style:table-cell-properties fo:padding-left="0.191cm" fo:padding-right="0.191cm" fo:padding-top="0cm" fo:padding-bottom="0cm" fo:border="0.5pt solid #000000" style:writing-mode="lr-tb"/>
    </style:style>
    <style:style style:name="Tabela3.C3" style:family="table-cell">
      <style:table-cell-properties fo:padding-left="0.191cm" fo:padding-right="0.191cm" fo:padding-top="0cm" fo:padding-bottom="0cm" fo:border="0.5pt solid #000000" style:writing-mode="lr-tb"/>
    </style:style>
    <style:style style:name="Tabela3.D3" style:family="table-cell">
      <style:table-cell-properties fo:padding-left="0.191cm" fo:padding-right="0.191cm" fo:padding-top="0cm" fo:padding-bottom="0cm" fo:border="0.5pt solid #000000" style:writing-mode="lr-tb"/>
    </style:style>
    <style:style style:name="Tabela3.A4" style:family="table-cell">
      <style:table-cell-properties fo:padding-left="0.191cm" fo:padding-right="0.191cm" fo:padding-top="0cm" fo:padding-bottom="0cm" fo:border="0.5pt solid #000000" style:writing-mode="lr-tb"/>
    </style:style>
    <style:style style:name="Tabela3.B4" style:family="table-cell">
      <style:table-cell-properties fo:padding-left="0.191cm" fo:padding-right="0.191cm" fo:padding-top="0cm" fo:padding-bottom="0cm" fo:border="0.5pt solid #000000" style:writing-mode="lr-tb"/>
    </style:style>
    <style:style style:name="Tabela3.C4" style:family="table-cell">
      <style:table-cell-properties fo:padding-left="0.191cm" fo:padding-right="0.191cm" fo:padding-top="0cm" fo:padding-bottom="0cm" fo:border="0.5pt solid #000000" style:writing-mode="lr-tb"/>
    </style:style>
    <style:style style:name="Tabela3.D4" style:family="table-cell">
      <style:table-cell-properties fo:padding-left="0.191cm" fo:padding-right="0.191cm" fo:padding-top="0cm" fo:padding-bottom="0cm" fo:border="0.5pt solid #000000" style:writing-mode="lr-tb"/>
    </style:style>
    <style:style style:name="Tabela3.A5" style:family="table-cell">
      <style:table-cell-properties fo:padding-left="0.191cm" fo:padding-right="0.191cm" fo:padding-top="0cm" fo:padding-bottom="0cm" fo:border="0.5pt solid #000000" style:writing-mode="lr-tb"/>
    </style:style>
    <style:style style:name="Tabela3.B5" style:family="table-cell">
      <style:table-cell-properties fo:padding-left="0.191cm" fo:padding-right="0.191cm" fo:padding-top="0cm" fo:padding-bottom="0cm" fo:border="0.5pt solid #000000" style:writing-mode="lr-tb"/>
    </style:style>
    <style:style style:name="Tabela3.C5" style:family="table-cell">
      <style:table-cell-properties fo:padding-left="0.191cm" fo:padding-right="0.191cm" fo:padding-top="0cm" fo:padding-bottom="0cm" fo:border="0.5pt solid #000000" style:writing-mode="lr-tb"/>
    </style:style>
    <style:style style:name="Tabela3.D5" style:family="table-cell">
      <style:table-cell-properties fo:padding-left="0.191cm" fo:padding-right="0.191cm" fo:padding-top="0cm" fo:padding-bottom="0cm" fo:border="0.5pt solid #000000" style:writing-mode="lr-tb"/>
    </style:style>
    <style:style style:name="Tabela3.A6" style:family="table-cell">
      <style:table-cell-properties fo:padding-left="0.191cm" fo:padding-right="0.191cm" fo:padding-top="0cm" fo:padding-bottom="0cm" fo:border="0.5pt solid #000000" style:writing-mode="lr-tb"/>
    </style:style>
    <style:style style:name="Tabela3.B6" style:family="table-cell">
      <style:table-cell-properties fo:padding-left="0.191cm" fo:padding-right="0.191cm" fo:padding-top="0cm" fo:padding-bottom="0cm" fo:border="0.5pt solid #000000" style:writing-mode="lr-tb"/>
    </style:style>
    <style:style style:name="Tabela3.C6" style:family="table-cell">
      <style:table-cell-properties fo:padding-left="0.191cm" fo:padding-right="0.191cm" fo:padding-top="0cm" fo:padding-bottom="0cm" fo:border="0.5pt solid #000000" style:writing-mode="lr-tb"/>
    </style:style>
    <style:style style:name="Tabela3.D6" style:family="table-cell">
      <style:table-cell-properties fo:padding-left="0.191cm" fo:padding-right="0.191cm" fo:padding-top="0cm" fo:padding-bottom="0cm" fo:border="0.5pt solid #000000" style:writing-mode="lr-tb"/>
    </style:style>
    <style:style style:name="Tabela3.A7" style:family="table-cell">
      <style:table-cell-properties fo:padding-left="0.191cm" fo:padding-right="0.191cm" fo:padding-top="0cm" fo:padding-bottom="0cm" fo:border="0.5pt solid #000000" style:writing-mode="lr-tb"/>
    </style:style>
    <style:style style:name="Tabela3.B7" style:family="table-cell">
      <style:table-cell-properties fo:padding-left="0.191cm" fo:padding-right="0.191cm" fo:padding-top="0cm" fo:padding-bottom="0cm" fo:border="0.5pt solid #000000" style:writing-mode="lr-tb"/>
    </style:style>
    <style:style style:name="Tabela3.C7" style:family="table-cell">
      <style:table-cell-properties fo:padding-left="0.191cm" fo:padding-right="0.191cm" fo:padding-top="0cm" fo:padding-bottom="0cm" fo:border="0.5pt solid #000000" style:writing-mode="lr-tb"/>
    </style:style>
    <style:style style:name="Tabela3.D7" style:family="table-cell">
      <style:table-cell-properties fo:padding-left="0.191cm" fo:padding-right="0.191cm" fo:padding-top="0cm" fo:padding-bottom="0cm" fo:border="0.5pt solid #000000" style:writing-mode="lr-tb"/>
    </style:style>
    <style:style style:name="Tabela3.A8" style:family="table-cell">
      <style:table-cell-properties fo:padding-left="0.191cm" fo:padding-right="0.191cm" fo:padding-top="0cm" fo:padding-bottom="0cm" fo:border="0.5pt solid #000000" style:writing-mode="lr-tb"/>
    </style:style>
    <style:style style:name="Tabela3.B8" style:family="table-cell">
      <style:table-cell-properties fo:padding-left="0.191cm" fo:padding-right="0.191cm" fo:padding-top="0cm" fo:padding-bottom="0cm" fo:border="0.5pt solid #000000" style:writing-mode="lr-tb"/>
    </style:style>
    <style:style style:name="Tabela3.C8" style:family="table-cell">
      <style:table-cell-properties fo:padding-left="0.191cm" fo:padding-right="0.191cm" fo:padding-top="0cm" fo:padding-bottom="0cm" fo:border="0.5pt solid #000000" style:writing-mode="lr-tb"/>
    </style:style>
    <style:style style:name="Tabela3.D8" style:family="table-cell">
      <style:table-cell-properties fo:padding-left="0.191cm" fo:padding-right="0.191cm" fo:padding-top="0cm" fo:padding-bottom="0cm" fo:border="0.5pt solid #000000" style:writing-mode="lr-tb"/>
    </style:style>
    <style:style style:name="Tabela4" style:family="table">
      <style:table-properties style:width="16.459cm" fo:margin-top="0cm" fo:margin-bottom="0cm" table:align="center" style:writing-mode="lr-tb"/>
    </style:style>
    <style:style style:name="Tabela4.A" style:family="table-column">
      <style:table-column-properties style:column-width="8.174cm"/>
    </style:style>
    <style:style style:name="Tabela4.B" style:family="table-column">
      <style:table-column-properties style:column-width="8.285cm"/>
    </style:style>
    <style:style style:name="Tabela4.1" style:family="table-row">
      <style:table-row-properties fo:keep-together="auto"/>
    </style:style>
    <style:style style:name="Tabela4.A1" style:family="table-cell">
      <style:table-cell-properties fo:background-color="#808080" fo:padding-left="0.191cm" fo:padding-right="0.191cm" fo:padding-top="0cm" fo:padding-bottom="0cm" fo:border="0.5pt solid #000000" style:writing-mode="lr-tb">
        <style:background-image/>
      </style:table-cell-properties>
    </style:style>
    <style:style style:name="Tabela4.A2" style:family="table-cell">
      <style:table-cell-properties fo:padding-left="0.191cm" fo:padding-right="0.191cm" fo:padding-top="0cm" fo:padding-bottom="0cm" fo:border="0.5pt solid #000000" style:writing-mode="lr-tb"/>
    </style:style>
    <style:style style:name="Tabela4.B2" style:family="table-cell">
      <style:table-cell-properties fo:padding-left="0.191cm" fo:padding-right="0.191cm" fo:padding-top="0cm" fo:padding-bottom="0cm" fo:border="0.5pt solid #000000" style:writing-mode="lr-tb"/>
    </style:style>
    <style:style style:name="Tabela4.A3" style:family="table-cell">
      <style:table-cell-properties fo:padding-left="0.191cm" fo:padding-right="0.191cm" fo:padding-top="0cm" fo:padding-bottom="0cm" fo:border="0.5pt solid #000000" style:writing-mode="lr-tb"/>
    </style:style>
    <style:style style:name="Tabela4.B3" style:family="table-cell">
      <style:table-cell-properties fo:padding-left="0.191cm" fo:padding-right="0.191cm" fo:padding-top="0cm" fo:padding-bottom="0cm" fo:border="0.5pt solid #000000" style:writing-mode="lr-tb"/>
    </style:style>
    <style:style style:name="Tabela4.A4" style:family="table-cell">
      <style:table-cell-properties fo:padding-left="0.191cm" fo:padding-right="0.191cm" fo:padding-top="0cm" fo:padding-bottom="0cm" fo:border="0.5pt solid #000000" style:writing-mode="lr-tb"/>
    </style:style>
    <style:style style:name="Tabela4.B4" style:family="table-cell">
      <style:table-cell-properties fo:padding-left="0.191cm" fo:padding-right="0.191cm" fo:padding-top="0cm" fo:padding-bottom="0cm" fo:border="0.5pt solid #000000" style:writing-mode="lr-tb"/>
    </style:style>
    <style:style style:name="Tabela4.A5" style:family="table-cell">
      <style:table-cell-properties fo:padding-left="0.191cm" fo:padding-right="0.191cm" fo:padding-top="0cm" fo:padding-bottom="0cm" fo:border="0.5pt solid #000000" style:writing-mode="lr-tb"/>
    </style:style>
    <style:style style:name="Tabela4.B5" style:family="table-cell">
      <style:table-cell-properties fo:padding-left="0.191cm" fo:padding-right="0.191cm" fo:padding-top="0cm" fo:padding-bottom="0cm" fo:border="0.5pt solid #000000" style:writing-mode="lr-tb"/>
    </style:style>
    <style:style style:name="Tabela4.A6" style:family="table-cell">
      <style:table-cell-properties fo:padding-left="0.191cm" fo:padding-right="0.191cm" fo:padding-top="0cm" fo:padding-bottom="0cm" fo:border="0.5pt solid #000000" style:writing-mode="lr-tb"/>
    </style:style>
    <style:style style:name="Tabela4.B6" style:family="table-cell">
      <style:table-cell-properties fo:padding-left="0.191cm" fo:padding-right="0.191cm" fo:padding-top="0cm" fo:padding-bottom="0cm" fo:border="0.5pt solid #000000" style:writing-mode="lr-tb"/>
    </style:style>
    <style:style style:name="Tabela5" style:family="table">
      <style:table-properties style:width="16.551cm" fo:margin-top="0cm" fo:margin-bottom="0cm" table:align="center" style:writing-mode="lr-tb"/>
    </style:style>
    <style:style style:name="Tabela5.A" style:family="table-column">
      <style:table-column-properties style:column-width="8.266cm"/>
    </style:style>
    <style:style style:name="Tabela5.B" style:family="table-column">
      <style:table-column-properties style:column-width="8.285cm"/>
    </style:style>
    <style:style style:name="Tabela5.1" style:family="table-row">
      <style:table-row-properties fo:keep-together="auto"/>
    </style:style>
    <style:style style:name="Tabela5.A1" style:family="table-cell">
      <style:table-cell-properties fo:background-color="#808080" fo:padding-left="0.191cm" fo:padding-right="0.191cm" fo:padding-top="0cm" fo:padding-bottom="0cm" fo:border="0.5pt solid #b2b2b2" style:writing-mode="lr-tb">
        <style:background-image/>
      </style:table-cell-properties>
    </style:style>
    <style:style style:name="Tabela5.A2" style:family="table-cell">
      <style:table-cell-properties fo:padding-left="0.191cm" fo:padding-right="0.191cm" fo:padding-top="0cm" fo:padding-bottom="0cm" fo:border="0.5pt solid #000000" style:writing-mode="lr-tb"/>
    </style:style>
    <style:style style:name="Tabela5.B2" style:family="table-cell">
      <style:table-cell-properties fo:padding-left="0.191cm" fo:padding-right="0.191cm" fo:padding-top="0cm" fo:padding-bottom="0cm" fo:border="0.5pt solid #000000" style:writing-mode="lr-tb"/>
    </style:style>
    <style:style style:name="Tabela5.A3" style:family="table-cell">
      <style:table-cell-properties fo:padding-left="0.191cm" fo:padding-right="0.191cm" fo:padding-top="0cm" fo:padding-bottom="0cm" fo:border="0.5pt solid #000000" style:writing-mode="lr-tb"/>
    </style:style>
    <style:style style:name="Tabela5.B3" style:family="table-cell">
      <style:table-cell-properties fo:padding-left="0.191cm" fo:padding-right="0.191cm" fo:padding-top="0cm" fo:padding-bottom="0cm" fo:border="0.5pt solid #000000" style:writing-mode="lr-tb"/>
    </style:style>
    <style:style style:name="Tabela5.A4" style:family="table-cell">
      <style:table-cell-properties fo:padding-left="0.191cm" fo:padding-right="0.191cm" fo:padding-top="0cm" fo:padding-bottom="0cm" fo:border="0.5pt solid #000000" style:writing-mode="lr-tb"/>
    </style:style>
    <style:style style:name="Tabela5.B4" style:family="table-cell">
      <style:table-cell-properties fo:padding-left="0.191cm" fo:padding-right="0.191cm" fo:padding-top="0cm" fo:padding-bottom="0cm" fo:border="0.5pt solid #000000" style:writing-mode="lr-tb"/>
    </style:style>
    <style:style style:name="Tabela5.A5" style:family="table-cell">
      <style:table-cell-properties fo:padding-left="0.191cm" fo:padding-right="0.191cm" fo:padding-top="0cm" fo:padding-bottom="0cm" fo:border="0.5pt solid #000000" style:writing-mode="lr-tb"/>
    </style:style>
    <style:style style:name="Tabela5.B5" style:family="table-cell">
      <style:table-cell-properties fo:padding-left="0.191cm" fo:padding-right="0.191cm" fo:padding-top="0cm" fo:padding-bottom="0cm" fo:border="0.5pt solid #000000" style:writing-mode="lr-tb"/>
    </style:style>
    <style:style style:name="Tabela5.A6" style:family="table-cell">
      <style:table-cell-properties fo:padding-left="0.191cm" fo:padding-right="0.191cm" fo:padding-top="0cm" fo:padding-bottom="0cm" fo:border="0.5pt solid #000000" style:writing-mode="lr-tb"/>
    </style:style>
    <style:style style:name="Tabela5.B6" style:family="table-cell">
      <style:table-cell-properties fo:padding-left="0.191cm" fo:padding-right="0.191cm" fo:padding-top="0cm" fo:padding-bottom="0cm" fo:border="0.5pt solid #000000" style:writing-mode="lr-tb"/>
    </style:style>
    <style:style style:name="Tabela5.A7" style:family="table-cell">
      <style:table-cell-properties fo:padding-left="0.191cm" fo:padding-right="0.191cm" fo:padding-top="0cm" fo:padding-bottom="0cm" fo:border="0.5pt solid #000000" style:writing-mode="lr-tb"/>
    </style:style>
    <style:style style:name="Tabela5.B7" style:family="table-cell">
      <style:table-cell-properties fo:padding-left="0.191cm" fo:padding-right="0.191cm" fo:padding-top="0cm" fo:padding-bottom="0cm" fo:border="0.5pt solid #000000" style:writing-mode="lr-tb"/>
    </style:style>
    <style:style style:name="Tabela5.A8" style:family="table-cell">
      <style:table-cell-properties fo:padding-left="0.191cm" fo:padding-right="0.191cm" fo:padding-top="0cm" fo:padding-bottom="0cm" fo:border="0.5pt solid #000000" style:writing-mode="lr-tb"/>
    </style:style>
    <style:style style:name="Tabela5.B8" style:family="table-cell">
      <style:table-cell-properties fo:padding-left="0.191cm" fo:padding-right="0.191cm" fo:padding-top="0cm" fo:padding-bottom="0cm" fo:border="0.5pt solid #000000" style:writing-mode="lr-tb"/>
    </style:style>
    <style:style style:name="Tabela6" style:family="table">
      <style:table-properties style:width="16.591cm" fo:margin-top="0cm" fo:margin-bottom="0cm" table:align="center" style:writing-mode="page"/>
    </style:style>
    <style:style style:name="Tabela6.A" style:family="table-column">
      <style:table-column-properties style:column-width="16.591cm"/>
    </style:style>
    <style:style style:name="Tabela6.1" style:family="table-row">
      <style:table-row-properties fo:keep-together="auto"/>
    </style:style>
    <style:style style:name="Tabela6.A1" style:family="table-cell">
      <style:table-cell-properties fo:background-color="#f2f2f2" fo:padding="0.141cm" fo:border="none">
        <style:background-image/>
      </style:table-cell-properties>
    </style:style>
    <style:style style:name="Tabela7" style:family="table">
      <style:table-properties style:width="16.591cm" fo:margin-top="0cm" fo:margin-bottom="0cm" table:align="center" style:writing-mode="page"/>
    </style:style>
    <style:style style:name="Tabela7.A" style:family="table-column">
      <style:table-column-properties style:column-width="16.591cm"/>
    </style:style>
    <style:style style:name="Tabela7.1" style:family="table-row">
      <style:table-row-properties fo:keep-together="auto"/>
    </style:style>
    <style:style style:name="Tabela7.A1" style:family="table-cell">
      <style:table-cell-properties fo:background-color="#f2f2f2" fo:padding="0.141cm" fo:border="none">
        <style:background-image/>
      </style:table-cell-properties>
    </style:style>
    <style:style style:name="Tabela8" style:family="table">
      <style:table-properties style:width="16.591cm" fo:margin-top="0cm" fo:margin-bottom="0cm" table:align="center" style:writing-mode="page"/>
    </style:style>
    <style:style style:name="Tabela8.A" style:family="table-column">
      <style:table-column-properties style:column-width="16.591cm"/>
    </style:style>
    <style:style style:name="Tabela8.1" style:family="table-row">
      <style:table-row-properties fo:keep-together="auto"/>
    </style:style>
    <style:style style:name="Tabela8.A1" style:family="table-cell">
      <style:table-cell-properties fo:background-color="#f2f2f2" fo:padding="0.141cm" fo:border="none">
        <style:background-image/>
      </style:table-cell-properties>
    </style:style>
    <style:style style:name="Tabela9" style:family="table">
      <style:table-properties style:width="16.591cm" fo:margin-top="0cm" fo:margin-bottom="0cm" table:align="center" style:writing-mode="page"/>
    </style:style>
    <style:style style:name="Tabela9.A" style:family="table-column">
      <style:table-column-properties style:column-width="16.591cm"/>
    </style:style>
    <style:style style:name="Tabela9.1" style:family="table-row">
      <style:table-row-properties fo:keep-together="auto"/>
    </style:style>
    <style:style style:name="Tabela9.A1" style:family="table-cell">
      <style:table-cell-properties fo:background-color="#f2f2f2" fo:padding="0.141cm" fo:border="none">
        <style:background-image/>
      </style:table-cell-properties>
    </style:style>
    <style:style style:name="Tabela10" style:family="table">
      <style:table-properties style:width="16.591cm" fo:margin-top="0cm" fo:margin-bottom="0cm" table:align="center" style:writing-mode="page"/>
    </style:style>
    <style:style style:name="Tabela10.A" style:family="table-column">
      <style:table-column-properties style:column-width="16.591cm"/>
    </style:style>
    <style:style style:name="Tabela10.1" style:family="table-row">
      <style:table-row-properties fo:keep-together="auto"/>
    </style:style>
    <style:style style:name="Tabela10.A1" style:family="table-cell">
      <style:table-cell-properties fo:background-color="#f2f2f2" fo:padding="0.141cm" fo:border="none">
        <style:background-image/>
      </style:table-cell-properties>
    </style:style>
    <style:style style:name="Tabela11" style:family="table">
      <style:table-properties style:width="16.591cm" fo:margin-top="0cm" fo:margin-bottom="0cm" table:align="center" style:writing-mode="page"/>
    </style:style>
    <style:style style:name="Tabela11.A" style:family="table-column">
      <style:table-column-properties style:column-width="16.591cm"/>
    </style:style>
    <style:style style:name="Tabela11.1" style:family="table-row">
      <style:table-row-properties fo:keep-together="auto"/>
    </style:style>
    <style:style style:name="Tabela11.A1" style:family="table-cell">
      <style:table-cell-properties fo:background-color="#f2f2f2" fo:padding="0.141cm" fo:border="none">
        <style:background-image/>
      </style:table-cell-properties>
    </style:style>
    <style:style style:name="Tabela12" style:family="table">
      <style:table-properties style:width="16.591cm" fo:margin-top="0cm" fo:margin-bottom="0cm" table:align="center" style:writing-mode="page"/>
    </style:style>
    <style:style style:name="Tabela12.A" style:family="table-column">
      <style:table-column-properties style:column-width="16.591cm"/>
    </style:style>
    <style:style style:name="Tabela12.1" style:family="table-row">
      <style:table-row-properties fo:keep-together="auto"/>
    </style:style>
    <style:style style:name="Tabela12.A1" style:family="table-cell">
      <style:table-cell-properties fo:background-color="#f2f2f2" fo:padding="0.141cm" fo:border="none">
        <style:background-image/>
      </style:table-cell-properties>
    </style:style>
    <style:style style:name="Tabela13" style:family="table">
      <style:table-properties style:width="16.591cm" fo:margin-top="0cm" fo:margin-bottom="0cm" table:align="center" style:writing-mode="page"/>
    </style:style>
    <style:style style:name="Tabela13.A" style:family="table-column">
      <style:table-column-properties style:column-width="16.591cm"/>
    </style:style>
    <style:style style:name="Tabela13.1" style:family="table-row">
      <style:table-row-properties fo:keep-together="auto"/>
    </style:style>
    <style:style style:name="Tabela13.A1" style:family="table-cell">
      <style:table-cell-properties fo:background-color="#f2f2f2" fo:padding="0.141cm" fo:border="none">
        <style:background-image/>
      </style:table-cell-properties>
    </style:style>
    <style:style style:name="Tabela14" style:family="table">
      <style:table-properties style:width="16.591cm" fo:margin-top="0cm" fo:margin-bottom="0cm" table:align="center" style:writing-mode="page"/>
    </style:style>
    <style:style style:name="Tabela14.A" style:family="table-column">
      <style:table-column-properties style:column-width="16.591cm"/>
    </style:style>
    <style:style style:name="Tabela14.1" style:family="table-row">
      <style:table-row-properties fo:keep-together="auto"/>
    </style:style>
    <style:style style:name="Tabela14.A1" style:family="table-cell">
      <style:table-cell-properties fo:background-color="#f2f2f2" fo:padding="0.141cm" fo:border="none">
        <style:background-image/>
      </style:table-cell-properties>
    </style:style>
    <style:style style:name="Tabela15" style:family="table">
      <style:table-properties style:width="16.591cm" fo:margin-top="0cm" fo:margin-bottom="0cm" table:align="center" style:writing-mode="page"/>
    </style:style>
    <style:style style:name="Tabela15.A" style:family="table-column">
      <style:table-column-properties style:column-width="16.591cm"/>
    </style:style>
    <style:style style:name="Tabela15.1" style:family="table-row">
      <style:table-row-properties fo:keep-together="auto"/>
    </style:style>
    <style:style style:name="Tabela15.A1" style:family="table-cell">
      <style:table-cell-properties fo:background-color="#f2f2f2" fo:padding="0.141cm" fo:border="none">
        <style:background-image/>
      </style:table-cell-properties>
    </style:style>
    <style:style style:name="Tabela16" style:family="table">
      <style:table-properties style:width="16.591cm" fo:margin-top="0cm" fo:margin-bottom="0cm" table:align="center" style:writing-mode="page"/>
    </style:style>
    <style:style style:name="Tabela16.A" style:family="table-column">
      <style:table-column-properties style:column-width="16.591cm"/>
    </style:style>
    <style:style style:name="Tabela16.1" style:family="table-row">
      <style:table-row-properties fo:keep-together="auto"/>
    </style:style>
    <style:style style:name="Tabela16.A1" style:family="table-cell">
      <style:table-cell-properties fo:background-color="#f2f2f2" fo:padding="0.141cm" fo:border="none">
        <style:background-image/>
      </style:table-cell-properties>
    </style:style>
    <style:style style:name="Tabela17" style:family="table">
      <style:table-properties style:width="16.591cm" fo:margin-top="0cm" fo:margin-bottom="0cm" table:align="center" style:writing-mode="page"/>
    </style:style>
    <style:style style:name="Tabela17.A" style:family="table-column">
      <style:table-column-properties style:column-width="16.591cm"/>
    </style:style>
    <style:style style:name="Tabela17.1" style:family="table-row">
      <style:table-row-properties fo:keep-together="auto"/>
    </style:style>
    <style:style style:name="Tabela17.A1" style:family="table-cell">
      <style:table-cell-properties fo:background-color="#f2f2f2" fo:padding="0.141cm" fo:border="none">
        <style:background-image/>
      </style:table-cell-properties>
    </style:style>
    <style:style style:name="Tabela18" style:family="table">
      <style:table-properties style:width="16.591cm" fo:margin-top="0cm" fo:margin-bottom="0cm" table:align="center" style:writing-mode="page"/>
    </style:style>
    <style:style style:name="Tabela18.A" style:family="table-column">
      <style:table-column-properties style:column-width="16.591cm"/>
    </style:style>
    <style:style style:name="Tabela18.1" style:family="table-row">
      <style:table-row-properties fo:keep-together="auto"/>
    </style:style>
    <style:style style:name="Tabela18.A1" style:family="table-cell">
      <style:table-cell-properties fo:background-color="#f2f2f2" fo:padding="0.141cm" fo:border="none">
        <style:background-image/>
      </style:table-cell-properties>
    </style:style>
    <style:style style:name="P1" style:family="paragraph" style:parent-style-name="Standard">
      <style:text-properties fo:color="#000000" loext:opacity="100%"/>
    </style:style>
    <style:style style:name="P2" style:family="paragraph" style:parent-style-name="Standard">
      <style:paragraph-properties fo:text-align="center" style:justify-single-word="false"/>
      <style:text-properties fo:color="#000000" loext:opacity="100%"/>
    </style:style>
    <style:style style:name="P3" style:family="paragraph" style:parent-style-name="Standard">
      <style:paragraph-properties fo:text-align="center" style:justify-single-word="false"/>
      <style:text-properties fo:color="#000000" loext:opacity="100%" fo:font-size="12pt" style:font-size-asian="12pt"/>
    </style:style>
    <style:style style:name="P4" style:family="paragraph" style:parent-style-name="Standard">
      <style:paragraph-properties fo:text-align="center" style:justify-single-word="false"/>
      <style:text-properties fo:color="#000000" loext:opacity="100%" fo:font-size="12pt" fo:font-style="italic" officeooo:rsid="0010c70b" officeooo:paragraph-rsid="0010c70b" style:font-size-asian="12pt" style:font-style-asian="italic"/>
    </style:style>
    <style:style style:name="P5" style:family="paragraph" style:parent-style-name="Heading_20_1">
      <style:paragraph-properties fo:margin-top="0cm" fo:margin-bottom="0cm" style:contextual-spacing="false" fo:break-before="page"/>
      <style:text-properties fo:color="#000000" loext:opacity="100%"/>
    </style:style>
    <style:style style:name="P6" style:family="paragraph" style:parent-style-name="Heading_20_1">
      <style:text-properties fo:color="#000000" loext:opacity="100%"/>
    </style:style>
    <style:style style:name="P7" style:family="paragraph" style:parent-style-name="Heading_20_2">
      <style:text-properties fo:color="#000000" loext:opacity="100%"/>
    </style:style>
    <style:style style:name="P8" style:family="paragraph" style:parent-style-name="List_20_1" style:list-style-name="WWNum1">
      <style:text-properties fo:color="#000000" loext:opacity="100%"/>
    </style:style>
    <style:style style:name="P9" style:family="paragraph" style:parent-style-name="Standard">
      <style:paragraph-properties fo:margin-top="0cm" fo:margin-bottom="0cm" style:contextual-spacing="false" fo:line-height="100%"/>
      <style:text-properties fo:color="#000000" loext:opacity="100%"/>
    </style:style>
    <style:style style:name="P10" style:family="paragraph" style:parent-style-name="Standard">
      <style:paragraph-properties fo:margin-top="0.071cm" fo:margin-bottom="0.071cm" style:contextual-spacing="false" fo:line-height="100%" fo:text-align="center" style:justify-single-word="false" fo:orphans="2" fo:widows="2"/>
      <style:text-properties fo:color="#000000" loext:opacity="100%" fo:language="en" fo:country="US" style:letter-kerning="false" style:font-name-asian="ＭＳ 明朝" style:language-asian="en" style:country-asian="US" style:font-name-complex="F" style:font-size-complex="11pt" style:language-complex="ar" style:country-complex="SA"/>
    </style:style>
    <style:style style:name="P11" style:family="paragraph" style:parent-style-name="Standard">
      <style:paragraph-properties fo:margin-top="0.071cm" fo:margin-bottom="0.071cm" style:contextual-spacing="false" fo:line-height="100%" fo:text-align="left" style:justify-single-word="false" fo:orphans="2" fo:widows="2"/>
      <style:text-properties fo:color="#000000" loext:opacity="100%" fo:language="en" fo:country="US" style:letter-kerning="false" style:font-name-asian="ＭＳ 明朝" style:language-asian="en" style:country-asian="US" style:font-name-complex="F" style:font-size-complex="11pt" style:language-complex="ar" style:country-complex="SA"/>
    </style:style>
    <style:style style:name="P12" style:family="paragraph" style:parent-style-name="Numbering_20_1" style:list-style-name="WWNum5">
      <style:text-properties fo:color="#000000" loext:opacity="100%"/>
    </style:style>
    <style:style style:name="T1" style:family="text">
      <style:text-properties fo:font-size="14pt" style:font-size-asian="14pt"/>
    </style:style>
    <style:style style:name="T2" style:family="text">
      <style:text-properties fo:font-size="22pt" fo:font-weight="bold" style:font-size-asian="22pt" style:font-weight-asian="bold"/>
    </style:style>
    <style:style style:name="T3" style:family="text">
      <style:text-properties fo:font-size="16pt" fo:font-weight="bold" style:font-size-asian="16pt" style:font-weight-asian="bold"/>
    </style:style>
    <style:style style:name="T4" style:family="text">
      <style:text-properties fo:font-size="13pt" fo:font-style="italic" style:font-size-asian="13pt" style:font-style-asian="italic"/>
    </style:style>
    <style:style style:name="T5" style:family="text">
      <style:text-properties fo:font-size="12pt" fo:font-weight="bold" style:font-size-asian="12pt" style:font-weight-asian="bold"/>
    </style:style>
    <style:style style:name="T6" style:family="text">
      <style:text-properties officeooo:rsid="0010c70b"/>
    </style:style>
    <style:style style:name="T7" style:family="text">
      <style:text-properties fo:font-size="12pt" officeooo:rsid="0010c70b" style:font-size-asian="12pt"/>
    </style:style>
    <style:style style:name="T8" style:family="text">
      <style:text-properties fo:font-size="12pt" style:font-size-asian="12pt"/>
    </style:style>
    <style:style style:name="T9" style:family="text">
      <style:text-properties fo:font-size="9pt" fo:font-style="italic" style:font-size-asian="9pt" style:font-style-asian="italic"/>
    </style:style>
    <style:style style:name="T10" style:family="text">
      <style:text-properties fo:font-family="Consolas" style:font-family-generic="roman" style:font-pitch="variable" fo:font-size="8.5pt" style:font-size-asian="8.5pt"/>
    </style:style>
    <style:style style:name="T11" style:family="text">
      <style:text-properties fo:font-size="10pt" fo:font-weight="bold" style:font-size-asian="10pt" style:font-weight-asian="bold"/>
    </style:style>
    <style:style style:name="T12" style:family="text">
      <style:text-properties fo:font-size="10pt" fo:font-weight="normal" style:font-size-asian="10pt"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2"><text:span text:style-name="T1">Bacharelado em Sistemas de Informação</text:span></text:p>
      <text:p text:style-name="P2"><text:span text:style-name="T1">Disciplina: Redes de Computadores</text:span></text:p>
      <text:p text:style-name="P1"/>
      <text:p text:style-name="P1"/>
      <text:p text:style-name="P1"/>
      <text:p text:style-name="P1"/>
      <text:p text:style-name="P2"><text:span text:style-name="T2">Relatório da Atividade Integradora</text:span></text:p>
      <text:p text:style-name="P2"><text:span text:style-name="T3">Jogo de Adivinhação (Sorteio de Números) — Aplicação<text:line-break/>Cliente-Servidor com Sockets TCP</text:span></text:p>
      <text:p text:style-name="P2"><text:span text:style-name="T4">Protocolo de aplicação: SORTEIO/1.0</text:span></text:p>
      <text:p text:style-name="P1"/>
      <text:p text:style-name="P1"/>
      <text:p text:style-name="P1"/>
      <text:p text:style-name="P1"/>
      <text:p text:style-name="P1"/>
      <text:p text:style-name="P1"/>
      <text:p text:style-name="P2"><text:span text:style-name="T5">Integrantes do grupo:</text:span></text:p>
      <text:p text:style-name="P3">Gabriel Rodrigues <text:span text:style-name="T6">e Antônio Carlos</text:span></text:p>
      <text:p text:style-name="P4"/>
      <text:p text:style-name="P1"><text:soft-page-break/></text:p>
      <text:p text:style-name="P1"/>
      <text:p text:style-name="P1"/>
      <text:p text:style-name="P1"/>
      <text:p text:style-name="P2"><text:span text:style-name="T7">maio</text:span><text:span text:style-name="T8"> de 2026</text:span></text:p>
      <text:p text:style-name="P1"/>
      <text:h text:style-name="P5" text:outline-level="1">1. Introdução</text:h>
      <text:p text:style-name="P1">Este relatório documenta o desenvolvimento da Atividade Integradora proposta como fechamento do conteúdo de Sockets em Redes de Computadores. A atividade consistiu em propor, implementar e testar uma pequena aplicação cliente-servidor baseada em sockets TCP, definindo um protocolo de aplicação próprio para a troca de mensagens entre os processos.</text:p>
      <text:p text:style-name="P1">O grupo optou pelo tema "Jogo de Adivinhação", no qual o servidor sorteia um conjunto de números e os clientes tentam adivinhar, em tempo real, qual ou quais números foram sorteados. A ênfase técnica recomendada para esse tema — comunicação via TCP com suporte a múltiplos clientes simultâneos — foi atendida por meio de um servidor multithread.</text:p>
      <text:p text:style-name="P1">O restante deste documento está organizado da seguinte forma: a Seção 2 apresenta a proposta escolhida (item 10.1 da apostila); a Seção 3 descreve a arquitetura cliente-servidor; a Seção 4 documenta formalmente o protocolo de aplicação SORTEIO/1.0 (item 10.3); a Seção 5 mapeia o atendimento aos requisitos mínimos (item 10.2); a Seção 6 traz os principais trechos de código; a Seção 7 apresenta as evidências de teste, incluindo execução com múltiplos clientes simultâneos e em rede local (itens 10.2 e 10.4); a Seção 8 discute limitações e melhorias; e a Seção 9 conclui o relatório.</text:p>
      <text:h text:style-name="P6" text:outline-level="1">2. Proposta (item 10.1)</text:h>
      <text:h text:style-name="P7" text:outline-level="2">2.1 Tema escolhido</text:h>
      <text:p text:style-name="P1">Jogo de Adivinhação — "o servidor sorteia número(s); clientes tentam adivinhar".</text:p>
      <text:h text:style-name="P7" text:outline-level="2">2.2 Descrição do problema</text:h>
      <text:p text:style-name="P1">Ao iniciar, o servidor sorteia aleatoriamente 5 números inteiros distintos no intervalo de 1 a 100 (constante QUANTIDADE_NUMEROS = 5) e os mantém em memória durante toda a execução. Cada cliente que se conecta é solicitado a informar um nome de identificação (com verificação de nomes duplicados) e, em seguida, pode enviar repetidamente palpites (números inteiros) tentando acertar um dos números sorteados. Para cada palpite, o servidor responde imediatamente informando se o número foi sorteado ("Parabéns!") ou não ("Você errou!"), permitindo que o jogador continue tentando até decidir encerrar a sessão com o comando /SAIR.</text:p>
      <text:h text:style-name="P7" text:outline-level="2"><text:soft-page-break/>2.3 Ênfase técnica</text:h>
      <text:p text:style-name="P1">TCP com múltiplos clientes simultâneos. O servidor utiliza socket TCP (SOCK_STREAM) e atende cada conexão em uma thread independente, permitindo que vários jogadores joguem ao mesmo tempo de forma concorrente, com acesso sincronizado (via threading.Lock) à estrutura compartilhada que registra os jogadores conectados.</text:p>
      <text:h text:style-name="P6" text:outline-level="1">3. Arquitetura Cliente-Servidor</text:h>
      <text:p text:style-name="P1">A aplicação é dividida em dois programas independentes, escritos em Python 3 utilizando apenas a biblioteca padrão (socket, threading, random e argparse):</text:p>
      <text:list text:style-name="WWNum1">
        <text:list-item>
          <text:p text:style-name="P8">Servidor (servidor_sorteio.py): cria um socket TCP, faz bind em 0.0.0.0:5004 (todas as interfaces de rede da máquina) e entra em um laço infinito de accept(). Para cada conexão aceita, uma nova thread (daemon) é criada executando a função atender_cliente, responsável por todo o ciclo de vida daquele jogador. Um dicionário global clientes (socket -&gt; nome) e um threading.Lock garantem o acesso seguro ao estado compartilhado entre as threads.</text:p>
        </text:list-item>
        <text:list-item>
          <text:p text:style-name="P8">Cliente (cliente_sorteio.py): recebe via linha de comando o endereço e a porta do servidor (argumentos --host e --porta, com valores padrão 127.0.0.1 e 5004) e estabelece uma conexão TCP. Uma thread separada (receber_mensagens) fica dedicada a receber e exibir, a qualquer momento, as mensagens enviadas pelo servidor, enquanto a thread principal lê a entrada do usuário (input()) e envia ao servidor — caracterizando comunicação full-duplex do ponto de vista do cliente.</text:p>
        </text:list-item>
      </text:list>
      <text:p text:style-name="P2"><text:span text:style-name="T9">Diagrama 1 — Visão geral da arquitetura cliente-servidor</text:span></text:p>
      <table:table table:name="Tabela1" table:style-name="Tabela1">
        <table:table-column table:style-name="Tabela1.A"/>
        <table:table-row table:style-name="Tabela1.1">
          <table:table-cell table:style-name="Tabela1.A1" office:value-type="string">
            <text:p text:style-name="P9"><text:span text:style-name="T10"><text:s text:c="26"/>Rede local (TCP/IP) - porta 5004</text:span></text:p>
            <text:p text:style-name="P9"><text:span text:style-name="T10"><text:s text:c="3"/>+----------------+ <text:s text:c="35"/>+-------------------------------+</text:span></text:p>
            <text:p text:style-name="P9"><text:span text:style-name="T10"><text:s text:c="3"/>| <text:s/>Cliente A <text:s text:c="5"/>| &lt;-------- conexao TCP #1 --------&gt;| <text:s text:c="31"/>|</text:span></text:p>
            <text:p text:style-name="P9"><text:span text:style-name="T10"><text:s text:c="3"/>| <text:s/>(Alice) <text:s text:c="7"/>| <text:s text:c="35"/>| <text:s text:c="2"/>Servidor de Sorteio <text:s text:c="9"/>|</text:span></text:p>
            <text:p text:style-name="P9"><text:span text:style-name="T10"><text:s text:c="3"/>+----------------+ <text:s text:c="35"/>| <text:s text:c="2"/>servidor_sorteio.py <text:s text:c="9"/>|</text:span></text:p>
            <text:p text:style-name="P9"><text:span text:style-name="T10"><text:s text:c="60"/>| <text:s text:c="2"/>- bind 0.0.0.0:5004 <text:s text:c="9"/>|</text:span></text:p>
            <text:p text:style-name="P9"><text:span text:style-name="T10"><text:s text:c="3"/>+----------------+ <text:s text:c="35"/>| <text:s text:c="2"/>- listen() / accept() loop <text:s text:c="2"/>|</text:span></text:p>
            <text:p text:style-name="P9"><text:span text:style-name="T10"><text:s text:c="3"/>| <text:s/>Cliente B <text:s text:c="5"/>| &lt;-------- conexao TCP #2 --------&gt;| <text:s text:c="2"/>- 1 thread por cliente <text:s text:c="7"/>|</text:span></text:p>
            <text:p text:style-name="P9"><text:span text:style-name="T10"><text:s text:c="3"/>| <text:s/>(Bob) <text:s text:c="9"/>| <text:s text:c="35"/>| <text:s text:c="2"/>- numeros_sorteados (5 nums) |</text:span></text:p>
            <text:p text:style-name="P9"><text:span text:style-name="T10"><text:s text:c="3"/>+----------------+ <text:s text:c="35"/>| <text:s text:c="2"/>- dict clientes{} + Lock <text:s text:c="5"/>|</text:span></text:p>
            <text:p text:style-name="P9"><text:span text:style-name="T10"><text:s text:c="60"/>| <text:s text:c="31"/>|</text:span></text:p>
            <text:p text:style-name="P9"><text:span text:style-name="T10"><text:s text:c="3"/>+----------------+ <text:s text:c="35"/>| <text:s text:c="31"/>|</text:span></text:p>
            <text:p text:style-name="P9"><text:span text:style-name="T10"><text:s text:c="3"/>| <text:s/>Cliente C <text:s text:c="5"/>| &lt;-------- conexao TCP #3 --------&gt;| <text:s text:c="31"/>|</text:span></text:p>
            <text:p text:style-name="P9"><text:span text:style-name="T10"><text:s text:c="3"/>| <text:s/>(Carla) <text:s text:c="7"/>| <text:s text:c="35"/>+-------------------------------+</text:span></text:p>
            <text:p text:style-name="P9"><text:span text:style-name="T10"><text:s text:c="3"/>+----------------+</text:span></text:p>
          </table:table-cell>
        </table:table-row>
      </table:table>
      <text:p text:style-name="P1"/>
      <text:h text:style-name="P6" text:outline-level="1"><text:soft-page-break/>4. Protocolo de Aplicação — SORTEIO/1.0 (item 10.3)</text:h>
      <text:p text:style-name="P1">Esta seção documenta formalmente o protocolo de aplicação criado para o jogo de adivinhação, seguindo a estrutura sugerida na apostila (item 10.3).</text:p>
      <text:h text:style-name="P7" text:outline-level="2">4.1 Identificação geral</text:h>
      <table:table table:name="Tabela2" table:style-name="Tabela2">
        <table:table-column table:style-name="Tabela2.A"/>
        <table:table-column table:style-name="Tabela2.B"/>
        <table:table-row table:style-name="Tabela2.1">
          <table:table-cell table:style-name="Tabela2.A1" office:value-type="string">
            <text:p text:style-name="P10"><text:span text:style-name="T11">Elemento</text:span></text:p>
          </table:table-cell>
          <table:table-cell table:style-name="Tabela2.A1" office:value-type="string">
            <text:p text:style-name="P10"><text:span text:style-name="T11">Descrição</text:span></text:p>
          </table:table-cell>
        </table:table-row>
        <table:table-row table:style-name="Tabela2.1">
          <table:table-cell table:style-name="Tabela2.A2" office:value-type="string">
            <text:p text:style-name="P11"><text:span text:style-name="T12">Nome do protocolo</text:span></text:p>
          </table:table-cell>
          <table:table-cell table:style-name="Tabela2.B2" office:value-type="string">
            <text:p text:style-name="P11"><text:span text:style-name="T12">SORTEIO/1.0</text:span></text:p>
          </table:table-cell>
        </table:table-row>
        <table:table-row table:style-name="Tabela2.1">
          <table:table-cell table:style-name="Tabela2.A3" office:value-type="string">
            <text:p text:style-name="P11"><text:span text:style-name="T12">Transporte utilizado</text:span></text:p>
          </table:table-cell>
          <table:table-cell table:style-name="Tabela2.B3" office:value-type="string">
            <text:p text:style-name="P11"><text:span text:style-name="T12">TCP (SOCK_STREAM). Justificativa: o jogo depende de uma sequência ordenada de requisição/resposta (nome -&gt; regras -&gt; palpite -&gt; resultado -&gt; ... -&gt; /SAIR) e cada palpite do jogador precisa de confirmação confiável do servidor. TCP garante entrega ordenada e sem perdas, eliminando a necessidade de implementar retransmissão/ACK na camada de aplicação, como seria exigido em UDP.</text:span></text:p>
          </table:table-cell>
        </table:table-row>
        <table:table-row table:style-name="Tabela2.1">
          <table:table-cell table:style-name="Tabela2.A4" office:value-type="string">
            <text:p text:style-name="P11"><text:span text:style-name="T12">Porta padrão</text:span></text:p>
          </table:table-cell>
          <table:table-cell table:style-name="Tabela2.B4" office:value-type="string">
            <text:p text:style-name="P11"><text:span text:style-name="T12">5004/TCP</text:span></text:p>
          </table:table-cell>
        </table:table-row>
        <table:table-row table:style-name="Tabela2.1">
          <table:table-cell table:style-name="Tabela2.A5" office:value-type="string">
            <text:p text:style-name="P11"><text:span text:style-name="T12">Formato das mensagens</text:span></text:p>
          </table:table-cell>
          <table:table-cell table:style-name="Tabela2.B5" office:value-type="string">
            <text:p text:style-name="P11"><text:span text:style-name="T12">Texto plano (UTF-8). Cada mensagem é uma string simples enviada via sendall()/recv(1024); as respostas do servidor terminam com "\n" para facilitar a exibição no cliente. Não há cabeçalho estruturado (ex.: JSON) — o conteúdo é interpretado diretamente como nome de jogador, palpite numérico ou comando.</text:span></text:p>
          </table:table-cell>
        </table:table-row>
        <table:table-row table:style-name="Tabela2.1">
          <table:table-cell table:style-name="Tabela2.A6" office:value-type="string">
            <text:p text:style-name="P11"><text:span text:style-name="T12">Encerramento</text:span></text:p>
          </table:table-cell>
          <table:table-cell table:style-name="Tabela2.B6" office:value-type="string">
            <text:p text:style-name="P11"><text:span text:style-name="T12">O cliente envia o comando /SAIR (texto comparado em maiúsculas) para finalizar a sessão voluntariamente. O servidor sai do laço de atendimento, remove o jogador do dicionário compartilhado de clientes e fecha o socket. Quedas abruptas de conexão (recv() retornando vazio ou OSError) são tratadas da mesma forma, garantindo a liberação do nome do jogador. O cliente também trata Ctrl+C, enviando /SAIR antes de encerrar.</text:span></text:p>
          </table:table-cell>
        </table:table-row>
      </table:table>
      <text:p text:style-name="P1"/>
      <text:h text:style-name="P7" text:outline-level="2">4.2 Comandos e mensagens</text:h>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office:value-type="string">
            <text:p text:style-name="P10"><text:span text:style-name="T11">Direção</text:span></text:p>
          </table:table-cell>
          <table:table-cell table:style-name="Tabela3.A1" office:value-type="string">
            <text:p text:style-name="P10"><text:span text:style-name="T11">Mensagem / Comando</text:span></text:p>
          </table:table-cell>
          <table:table-cell table:style-name="Tabela3.A1" office:value-type="string">
            <text:p text:style-name="P10"><text:span text:style-name="T11">Quando ocorre</text:span></text:p>
          </table:table-cell>
          <table:table-cell table:style-name="Tabela3.A1" office:value-type="string">
            <text:p text:style-name="P10"><text:span text:style-name="T11">Resposta esperada</text:span></text:p>
          </table:table-cell>
        </table:table-row>
        <table:table-row table:style-name="Tabela3.1">
          <table:table-cell table:style-name="Tabela3.A2" office:value-type="string">
            <text:p text:style-name="P11"><text:span text:style-name="T12">Servidor -&gt; Cliente</text:span></text:p>
          </table:table-cell>
          <table:table-cell table:style-name="Tabela3.B2" office:value-type="string">
            <text:p text:style-name="P11"><text:span text:style-name="T12">"Digite seu nome: "</text:span></text:p>
          </table:table-cell>
          <table:table-cell table:style-name="Tabela3.C2" office:value-type="string">
            <text:p text:style-name="P11"><text:span text:style-name="T12">Imediatamente após a conexão ser aceita.</text:span></text:p>
          </table:table-cell>
          <table:table-cell table:style-name="Tabela3.D2" office:value-type="string">
            <text:p text:style-name="P11"><text:span text:style-name="T12">Cliente envia uma string com o nome do jogador.</text:span></text:p>
          </table:table-cell>
        </table:table-row>
        <text:soft-page-break/>
        <table:table-row table:style-name="Tabela3.1">
          <table:table-cell table:style-name="Tabela3.A3" office:value-type="string">
            <text:p text:style-name="P11"><text:span text:style-name="T12">Cliente -&gt; Servidor</text:span></text:p>
          </table:table-cell>
          <table:table-cell table:style-name="Tabela3.B3" office:value-type="string">
            <text:p text:style-name="P11"><text:span text:style-name="T12">&lt;nome do jogador&gt; (texto livre)</text:span></text:p>
          </table:table-cell>
          <table:table-cell table:style-name="Tabela3.C3" office:value-type="string">
            <text:p text:style-name="P11"><text:span text:style-name="T12">Resposta ao prompt de identificação.</text:span></text:p>
          </table:table-cell>
          <table:table-cell table:style-name="Tabela3.D3" office:value-type="string">
            <text:p text:style-name="P11"><text:span text:style-name="T12">Se o nome já estiver em uso, servidor reenvia "Nome já em uso. Digite outro nome: " e aguarda novo envio. Caso contrário, servidor registra o jogador.</text:span></text:p>
          </table:table-cell>
        </table:table-row>
        <table:table-row table:style-name="Tabela3.1">
          <table:table-cell table:style-name="Tabela3.A4" office:value-type="string">
            <text:p text:style-name="P11"><text:span text:style-name="T12">Servidor -&gt; Cliente</text:span></text:p>
          </table:table-cell>
          <table:table-cell table:style-name="Tabela3.B4" office:value-type="string">
            <text:p text:style-name="P11"><text:span text:style-name="T12">"Tente adivinhar um dos 5 números sorteados entre 1 e 100! (ou /SAIR para sair)\n"</text:span></text:p>
          </table:table-cell>
          <table:table-cell table:style-name="Tabela3.C4" office:value-type="string">
            <text:p text:style-name="P11"><text:span text:style-name="T12">Após o nome ser aceito.</text:span></text:p>
          </table:table-cell>
          <table:table-cell table:style-name="Tabela3.D4" office:value-type="string">
            <text:p text:style-name="P11"><text:span text:style-name="T12">Inicia a fase de jogo; nenhuma resposta imediata é exigida.</text:span></text:p>
          </table:table-cell>
        </table:table-row>
        <table:table-row table:style-name="Tabela3.1">
          <table:table-cell table:style-name="Tabela3.A5" office:value-type="string">
            <text:p text:style-name="P11"><text:span text:style-name="T12">Cliente -&gt; Servidor</text:span></text:p>
          </table:table-cell>
          <table:table-cell table:style-name="Tabela3.B5" office:value-type="string">
            <text:p text:style-name="P11"><text:span text:style-name="T12">&lt;número inteiro&gt; (ex.: "42")</text:span></text:p>
          </table:table-cell>
          <table:table-cell table:style-name="Tabela3.C5" office:value-type="string">
            <text:p text:style-name="P11"><text:span text:style-name="T12">Jogador tenta um palpite durante a fase de jogo.</text:span></text:p>
          </table:table-cell>
          <table:table-cell table:style-name="Tabela3.D5" office:value-type="string">
            <text:p text:style-name="P11"><text:span text:style-name="T12">"Parabéns! Você acertou, X é um dos números sorteados!\n" se X estiver entre os sorteados, ou "Você errou! X não foi sorteado. Tente novamente.\n" caso contrário.</text:span></text:p>
          </table:table-cell>
        </table:table-row>
        <table:table-row table:style-name="Tabela3.1">
          <table:table-cell table:style-name="Tabela3.A6" office:value-type="string">
            <text:p text:style-name="P11"><text:span text:style-name="T12">Cliente -&gt; Servidor</text:span></text:p>
          </table:table-cell>
          <table:table-cell table:style-name="Tabela3.B6" office:value-type="string">
            <text:p text:style-name="P11"><text:span text:style-name="T12">/SAIR (não sensível a maiúsculas/minúsculas)</text:span></text:p>
          </table:table-cell>
          <table:table-cell table:style-name="Tabela3.C6" office:value-type="string">
            <text:p text:style-name="P11"><text:span text:style-name="T12">Jogador deseja encerrar a sessão.</text:span></text:p>
          </table:table-cell>
          <table:table-cell table:style-name="Tabela3.D6" office:value-type="string">
            <text:p text:style-name="P11"><text:span text:style-name="T12">Servidor encerra o laço, remove o jogador e fecha a conexão (sem mensagem de resposta).</text:span></text:p>
          </table:table-cell>
        </table:table-row>
        <table:table-row table:style-name="Tabela3.1">
          <table:table-cell table:style-name="Tabela3.A7" office:value-type="string">
            <text:p text:style-name="P11"><text:span text:style-name="T12">Cliente -&gt; Servidor</text:span></text:p>
          </table:table-cell>
          <table:table-cell table:style-name="Tabela3.B7" office:value-type="string">
            <text:p text:style-name="P11"><text:span text:style-name="T12">/&lt;outro comando&gt; (ex.: "/AJUDA")</text:span></text:p>
          </table:table-cell>
          <table:table-cell table:style-name="Tabela3.C7" office:value-type="string">
            <text:p text:style-name="P11"><text:span text:style-name="T12">Jogador envia um comando iniciado por "/" que não é /SAIR.</text:span></text:p>
          </table:table-cell>
          <table:table-cell table:style-name="Tabela3.D7" office:value-type="string">
            <text:p text:style-name="P11"><text:span text:style-name="T12">"Comando desconhecido: &lt;comando&gt;. Comando válido: /SAIR\n"</text:span></text:p>
          </table:table-cell>
        </table:table-row>
        <table:table-row table:style-name="Tabela3.1">
          <table:table-cell table:style-name="Tabela3.A8" office:value-type="string">
            <text:p text:style-name="P11"><text:span text:style-name="T12">Cliente -&gt; Servidor</text:span></text:p>
          </table:table-cell>
          <table:table-cell table:style-name="Tabela3.B8" office:value-type="string">
            <text:p text:style-name="P11"><text:span text:style-name="T12">Entrada não numérica e sem "/" (ex.: "abc")</text:span></text:p>
          </table:table-cell>
          <table:table-cell table:style-name="Tabela3.C8" office:value-type="string">
            <text:p text:style-name="P11"><text:span text:style-name="T12">Jogador envia texto que não representa um número inteiro.</text:span></text:p>
          </table:table-cell>
          <table:table-cell table:style-name="Tabela3.D8" office:value-type="string">
            <text:p text:style-name="P11"><text:span text:style-name="T12">"Entrada inválida. Por favor, envie um número inteiro válido ou o comando /SAIR.\n"</text:span></text:p>
          </table:table-cell>
        </table:table-row>
      </table:table>
      <text:p text:style-name="P1"/>
      <text:h text:style-name="P7" text:outline-level="2">4.3 Mensagens de erro previstas</text:h>
      <table:table table:name="Tabela4" table:style-name="Tabela4">
        <table:table-column table:style-name="Tabela4.A"/>
        <table:table-column table:style-name="Tabela4.B"/>
        <table:table-row table:style-name="Tabela4.1">
          <table:table-cell table:style-name="Tabela4.A1" office:value-type="string">
            <text:p text:style-name="P10"><text:span text:style-name="T11">Situação</text:span></text:p>
          </table:table-cell>
          <table:table-cell table:style-name="Tabela4.A1" office:value-type="string">
            <text:p text:style-name="P10"><text:span text:style-name="T11">Mensagem retornada pelo servidor/cliente</text:span></text:p>
          </table:table-cell>
        </table:table-row>
        <table:table-row table:style-name="Tabela4.1">
          <table:table-cell table:style-name="Tabela4.A2" office:value-type="string">
            <text:p text:style-name="P11"><text:span text:style-name="T12">Nome de jogador já em uso por outra conexão ativa</text:span></text:p>
          </table:table-cell>
          <table:table-cell table:style-name="Tabela4.B2" office:value-type="string">
            <text:p text:style-name="P11"><text:span text:style-name="T12">"Nome já em uso. Digite outro nome: " (servidor solicita novo nome, repetidamente se necessário)</text:span></text:p>
          </table:table-cell>
        </table:table-row>
        <text:soft-page-break/>
        <table:table-row table:style-name="Tabela4.1">
          <table:table-cell table:style-name="Tabela4.A3" office:value-type="string">
            <text:p text:style-name="P11"><text:span text:style-name="T12">Entrada que não é um número inteiro válido e não começa com "/"</text:span></text:p>
          </table:table-cell>
          <table:table-cell table:style-name="Tabela4.B3" office:value-type="string">
            <text:p text:style-name="P11"><text:span text:style-name="T12">"Entrada inválida. Por favor, envie um número inteiro válido ou o comando /SAIR.\n"</text:span></text:p>
          </table:table-cell>
        </table:table-row>
        <table:table-row table:style-name="Tabela4.1">
          <table:table-cell table:style-name="Tabela4.A4" office:value-type="string">
            <text:p text:style-name="P11"><text:span text:style-name="T12">Comando iniciado por "/" diferente de /SAIR</text:span></text:p>
          </table:table-cell>
          <table:table-cell table:style-name="Tabela4.B4" office:value-type="string">
            <text:p text:style-name="P11"><text:span text:style-name="T12">"Comando desconhecido: &lt;comando&gt;. Comando válido: /SAIR\n"</text:span></text:p>
          </table:table-cell>
        </table:table-row>
        <table:table-row table:style-name="Tabela4.1">
          <table:table-cell table:style-name="Tabela4.A5" office:value-type="string">
            <text:p text:style-name="P11"><text:span text:style-name="T12">Cliente não consegue conectar ao servidor (porta fechada/host inacessível)</text:span></text:p>
          </table:table-cell>
          <table:table-cell table:style-name="Tabela4.B5" office:value-type="string">
            <text:p text:style-name="P11"><text:span text:style-name="T12">Cliente exibe: "Não foi possível conectar ao servidor em &lt;host&gt;:&lt;porta&gt;." e termina (ConnectionRefusedError tratado localmente).</text:span></text:p>
          </table:table-cell>
        </table:table-row>
        <table:table-row table:style-name="Tabela4.1">
          <table:table-cell table:style-name="Tabela4.A6" office:value-type="string">
            <text:p text:style-name="P11"><text:span text:style-name="T12">Servidor encerra a conexão ou ela cai abruptamente</text:span></text:p>
          </table:table-cell>
          <table:table-cell table:style-name="Tabela4.B6" office:value-type="string">
            <text:p text:style-name="P11"><text:span text:style-name="T12">Cliente exibe: "[Conexão encerrada pelo servidor]" e a thread de recepção termina.</text:span></text:p>
          </table:table-cell>
        </table:table-row>
      </table:table>
      <text:p text:style-name="P1"/>
      <text:h text:style-name="P6" text:outline-level="1">5. Requisitos Mínimos Atendidos (item 10.2)</text:h>
      <table:table table:name="Tabela5" table:style-name="Tabela5">
        <table:table-column table:style-name="Tabela5.A"/>
        <table:table-column table:style-name="Tabela5.B"/>
        <table:table-row table:style-name="Tabela5.1">
          <table:table-cell table:style-name="Tabela5.A1" office:value-type="string">
            <text:p text:style-name="P10"><text:span text:style-name="T11">Requisito</text:span></text:p>
          </table:table-cell>
          <table:table-cell table:style-name="Tabela5.A1" office:value-type="string">
            <text:p text:style-name="P10"><text:span text:style-name="T11">Como foi atendido</text:span></text:p>
          </table:table-cell>
        </table:table-row>
        <table:table-row table:style-name="Tabela5.1">
          <table:table-cell table:style-name="Tabela5.A2" office:value-type="string">
            <text:p text:style-name="P11"><text:span text:style-name="T12">Pelo menos um servidor e um cliente em Python</text:span></text:p>
          </table:table-cell>
          <table:table-cell table:style-name="Tabela5.B2" office:value-type="string">
            <text:p text:style-name="P11"><text:span text:style-name="T12">servidor_sorteio.py e cliente_sorteio.py, ambos em Python 3.</text:span></text:p>
          </table:table-cell>
        </table:table-row>
        <table:table-row table:style-name="Tabela5.1">
          <table:table-cell table:style-name="Tabela5.A3" office:value-type="string">
            <text:p text:style-name="P11"><text:span text:style-name="T12">Uso direto de sockets, sem frameworks de alto nível</text:span></text:p>
          </table:table-cell>
          <table:table-cell table:style-name="Tabela5.B3" office:value-type="string">
            <text:p text:style-name="P11"><text:span text:style-name="T12">Implementação utiliza apenas os módulos da biblioteca padrão socket, threading, random e argparse. Nenhum framework de rede externo foi utilizado.</text:span></text:p>
          </table:table-cell>
        </table:table-row>
        <table:table-row table:style-name="Tabela5.1">
          <table:table-cell table:style-name="Tabela5.A4" office:value-type="string">
            <text:p text:style-name="P11"><text:span text:style-name="T12">Protocolo de aplicação definido e documentado</text:span></text:p>
          </table:table-cell>
          <table:table-cell table:style-name="Tabela5.B4" office:value-type="string">
            <text:p text:style-name="P11"><text:span text:style-name="T12">Protocolo SORTEIO/1.0 documentado na Seção 4 deste relatório e também em documentacao_protocolo.md, incluindo formato de mensagens, comandos e erros.</text:span></text:p>
          </table:table-cell>
        </table:table-row>
        <table:table-row table:style-name="Tabela5.1">
          <table:table-cell table:style-name="Tabela5.A5" office:value-type="string">
            <text:p text:style-name="P11"><text:span text:style-name="T12">Tratamento de entradas inválidas ou comandos desconhecidos</text:span></text:p>
          </table:table-cell>
          <table:table-cell table:style-name="Tabela5.B5" office:value-type="string">
            <text:p text:style-name="P11"><text:span text:style-name="T12">Servidor trata: nomes duplicados, comandos iniciados por "/" diferentes de /SAIR e entradas não numéricas (ValueError), retornando mensagens específicas para cada caso (ver Seção 4.3). Cliente trata recusa de conexão e encerramento abrupto.</text:span></text:p>
          </table:table-cell>
        </table:table-row>
        <table:table-row table:style-name="Tabela5.1">
          <table:table-cell table:style-name="Tabela5.A6" office:value-type="string">
            <text:p text:style-name="P11"><text:span text:style-name="T12">Execução em rede local (não somente localhost)</text:span></text:p>
          </table:table-cell>
          <table:table-cell table:style-name="Tabela5.B6" office:value-type="string">
            <text:p text:style-name="P11"><text:span text:style-name="T12">Servidor faz bind em 0.0.0.0:5004 (todas as interfaces). Cliente aceita --host e --porta por linha de comando. Teste realizado conectando ao IP da máquina na rede local (192.168.0.14), ver Seção 7.2.</text:span></text:p>
          </table:table-cell>
        </table:table-row>
        <table:table-row table:style-name="Tabela5.1">
          <table:table-cell table:style-name="Tabela5.A7" office:value-type="string">
            <text:p text:style-name="P11"><text:span text:style-name="T12">Evidências de teste com pelo menos duas máquinas ou dois clientes simultâneos</text:span></text:p>
          </table:table-cell>
          <table:table-cell table:style-name="Tabela5.B7" office:value-type="string">
            <text:p text:style-name="P11"><text:span text:style-name="T12">Seção 7.1 apresenta um teste com três clientes (Alice, Bob e Carla) conectados simultaneamente ao mesmo servidor, com logs completos do servidor e de cada cliente.</text:span></text:p>
          </table:table-cell>
        </table:table-row>
        <table:table-row table:style-name="Tabela5.1">
          <table:table-cell table:style-name="Tabela5.A8" office:value-type="string">
            <text:p text:style-name="P11"><text:span text:style-name="T12">Apresentação de limitações e possíveis melhorias</text:span></text:p>
          </table:table-cell>
          <table:table-cell table:style-name="Tabela5.B8" office:value-type="string">
            <text:p text:style-name="P11"><text:span text:style-name="T12">Seção 8 deste relatório.</text:span></text:p>
          </table:table-cell>
        </table:table-row>
      </table:table>
      <text:p text:style-name="P1"/>
      <text:h text:style-name="P6" text:outline-level="1"><text:soft-page-break/>6. Principais Trechos de Código</text:h>
      <text:h text:style-name="P7" text:outline-level="2">6.1 Servidor — configuração inicial e sorteio dos números</text:h>
      <text:p text:style-name="P1">No início da execução, o servidor define o endereço de escuta (todas as interfaces), a porta padrão e sorteia, sem repetição, os números que os jogadores tentarão adivinhar.</text:p>
      <table:table table:name="Tabela6" table:style-name="Tabela6">
        <table:table-column table:style-name="Tabela6.A"/>
        <table:table-row table:style-name="Tabela6.1">
          <table:table-cell table:style-name="Tabela6.A1" office:value-type="string">
            <text:p text:style-name="P9"><text:span text:style-name="T10">import socket</text:span></text:p>
            <text:p text:style-name="P9"><text:span text:style-name="T10">import threading</text:span></text:p>
            <text:p text:style-name="P9"><text:span text:style-name="T10">import random</text:span></text:p>
            <text:p text:style-name="P9"><text:span text:style-name="T10"/></text:p>
            <text:p text:style-name="P9"><text:span text:style-name="T10">HOST = "0.0.0.0"</text:span></text:p>
            <text:p text:style-name="P9"><text:span text:style-name="T10">PORTA = 5004</text:span></text:p>
            <text:p text:style-name="P9"><text:span text:style-name="T10"/></text:p>
            <text:p text:style-name="P9"><text:span text:style-name="T10">clientes = {}</text:span></text:p>
            <text:p text:style-name="P9"><text:span text:style-name="T10">lock = threading.Lock()</text:span></text:p>
            <text:p text:style-name="P9"><text:span text:style-name="T10"/></text:p>
            <text:p text:style-name="P9"><text:span text:style-name="T10">QUANTIDADE_NUMEROS = 5</text:span></text:p>
            <text:p text:style-name="P9"><text:span text:style-name="T10">numeros_sorteados = random.sample(range(1, 101), QUANTIDADE_NUMEROS)</text:span></text:p>
          </table:table-cell>
        </table:table-row>
      </table:table>
      <text:p text:style-name="P1"/>
      <text:h text:style-name="P7" text:outline-level="2">6.2 Servidor — identificação do jogador e nomes duplicados</text:h>
      <table:table table:name="Tabela7" table:style-name="Tabela7">
        <table:table-column table:style-name="Tabela7.A"/>
        <table:table-row table:style-name="Tabela7.1">
          <table:table-cell table:style-name="Tabela7.A1" office:value-type="string">
            <text:p text:style-name="P9"><text:span text:style-name="T10">conexao.sendall("Digite seu nome: ".encode("utf-8"))</text:span></text:p>
            <text:p text:style-name="P9"><text:span text:style-name="T10">nome = conexao.recv(1024).decode("utf-8").strip()</text:span></text:p>
            <text:p text:style-name="P9"><text:span text:style-name="T10"/></text:p>
            <text:p text:style-name="P9"><text:span text:style-name="T10"># verificação de nomes repetidos</text:span></text:p>
            <text:p text:style-name="P9"><text:span text:style-name="T10">while True:</text:span></text:p>
            <text:p text:style-name="P9"><text:span text:style-name="T10"><text:s text:c="4"/>with lock:</text:span></text:p>
            <text:p text:style-name="P9"><text:span text:style-name="T10"><text:s text:c="8"/>em_uso = nome in clientes.values()</text:span></text:p>
            <text:p text:style-name="P9"><text:span text:style-name="T10"><text:s text:c="4"/>if not em_uso:</text:span></text:p>
            <text:p text:style-name="P9"><text:span text:style-name="T10"><text:s text:c="8"/>break</text:span></text:p>
            <text:p text:style-name="P9"><text:span text:style-name="T10"><text:s text:c="4"/>conexao.sendall("Nome já em uso. Digite outro nome: ".encode("utf-8"))</text:span></text:p>
            <text:p text:style-name="P9"><text:span text:style-name="T10"><text:s text:c="4"/>nome = conexao.recv(1024).decode("utf-8").strip()</text:span></text:p>
            <text:p text:style-name="P9"><text:span text:style-name="T10"/></text:p>
            <text:p text:style-name="P9"><text:span text:style-name="T10">if not nome:</text:span></text:p>
            <text:p text:style-name="P9"><text:span text:style-name="T10"><text:s text:c="4"/>nome = f"cliente-{endereco[1]}"</text:span></text:p>
            <text:p text:style-name="P9"><text:span text:style-name="T10"/></text:p>
            <text:p text:style-name="P9"><text:span text:style-name="T10">with lock:</text:span></text:p>
            <text:p text:style-name="P9"><text:span text:style-name="T10"><text:s text:c="4"/>clientes[conexao] = nome</text:span></text:p>
          </table:table-cell>
        </table:table-row>
      </table:table>
      <text:p text:style-name="P1"/>
      <text:h text:style-name="P7" text:outline-level="2">6.3 Servidor — laço do jogo, comandos e tratamento de erros</text:h>
      <table:table table:name="Tabela8" table:style-name="Tabela8">
        <table:table-column table:style-name="Tabela8.A"/>
        <table:table-row table:style-name="Tabela8.1">
          <table:table-cell table:style-name="Tabela8.A1" office:value-type="string">
            <text:p text:style-name="P9"><text:span text:style-name="T10">while True:</text:span></text:p>
            <text:p text:style-name="P9"><text:span text:style-name="T10"><text:s text:c="4"/>dados = conexao.recv(1024)</text:span></text:p>
            <text:p text:style-name="P9"><text:span text:style-name="T10"><text:s text:c="4"/>if not dados:</text:span></text:p>
            <text:p text:style-name="P9"><text:span text:style-name="T10"><text:s text:c="8"/>break</text:span></text:p>
            <text:p text:style-name="P9"><text:span text:style-name="T10"><text:s text:c="4"/>texto = dados.decode("utf-8").strip()</text:span></text:p>
            <text:p text:style-name="P9"><text:span text:style-name="T10"><text:s text:c="4"/>if texto.upper() == "/SAIR":</text:span></text:p>
            <text:p text:style-name="P9"><text:span text:style-name="T10"><text:s text:c="8"/>break</text:span></text:p>
            <text:p text:style-name="P9"><text:span text:style-name="T10"/></text:p>
            <text:p text:style-name="P9"><text:soft-page-break/><text:span text:style-name="T10"><text:s text:c="4"/>if texto.startswith("/"):</text:span></text:p>
            <text:p text:style-name="P9"><text:span text:style-name="T10"><text:s text:c="8"/>conexao.sendall(</text:span></text:p>
            <text:p text:style-name="P9"><text:span text:style-name="T10"><text:s text:c="12"/>f"Comando desconhecido: {texto}. Comando válido: /SAIR\n".encode("utf-8")</text:span></text:p>
            <text:p text:style-name="P9"><text:span text:style-name="T10"><text:s text:c="8"/>)</text:span></text:p>
            <text:p text:style-name="P9"><text:span text:style-name="T10"><text:s text:c="8"/>continue</text:span></text:p>
            <text:p text:style-name="P9"><text:span text:style-name="T10"/></text:p>
            <text:p text:style-name="P9"><text:span text:style-name="T10"><text:s text:c="4"/>try:</text:span></text:p>
            <text:p text:style-name="P9"><text:span text:style-name="T10"><text:s text:c="8"/>chute = int(texto)</text:span></text:p>
            <text:p text:style-name="P9"><text:span text:style-name="T10"><text:s text:c="8"/>if chute in numeros_sorteados:</text:span></text:p>
            <text:p text:style-name="P9"><text:span text:style-name="T10"><text:s text:c="12"/>conexao.sendall(</text:span></text:p>
            <text:p text:style-name="P9"><text:span text:style-name="T10"><text:s text:c="16"/>f"Parabéns! Você acertou, {chute} é um dos números sorteados!\n".encode("utf-8")</text:span></text:p>
            <text:p text:style-name="P9"><text:span text:style-name="T10"><text:s text:c="12"/>)</text:span></text:p>
            <text:p text:style-name="P9"><text:span text:style-name="T10"><text:s text:c="8"/>else:</text:span></text:p>
            <text:p text:style-name="P9"><text:span text:style-name="T10"><text:s text:c="12"/>conexao.sendall(</text:span></text:p>
            <text:p text:style-name="P9"><text:span text:style-name="T10"><text:s text:c="16"/>f"Você errou! {chute} não foi sorteado. Tente novamente.\n".encode("utf-8")</text:span></text:p>
            <text:p text:style-name="P9"><text:span text:style-name="T10"><text:s text:c="12"/>)</text:span></text:p>
            <text:p text:style-name="P9"><text:span text:style-name="T10"><text:s text:c="4"/>except ValueError:</text:span></text:p>
            <text:p text:style-name="P9"><text:span text:style-name="T10"><text:s text:c="8"/>conexao.sendall(</text:span></text:p>
            <text:p text:style-name="P9"><text:span text:style-name="T10"><text:s text:c="12"/>"Entrada inválida. Por favor, envie um número inteiro válido "</text:span></text:p>
            <text:p text:style-name="P9"><text:span text:style-name="T10"><text:s text:c="12"/>"ou o comando /SAIR.\n".encode("utf-8")</text:span></text:p>
            <text:p text:style-name="P9"><text:span text:style-name="T10"><text:s text:c="8"/>)</text:span></text:p>
          </table:table-cell>
        </table:table-row>
      </table:table>
      <text:p text:style-name="P1"/>
      <text:h text:style-name="P7" text:outline-level="2">6.4 Servidor — laço principal de aceitação de conexões</text:h>
      <table:table table:name="Tabela9" table:style-name="Tabela9">
        <table:table-column table:style-name="Tabela9.A"/>
        <table:table-row table:style-name="Tabela9.1">
          <table:table-cell table:style-name="Tabela9.A1" office:value-type="string">
            <text:p text:style-name="P9"><text:span text:style-name="T10">with socket.socket(socket.AF_INET, socket.SOCK_STREAM) as servidor:</text:span></text:p>
            <text:p text:style-name="P9"><text:span text:style-name="T10"><text:s text:c="4"/>servidor.setsockopt(socket.SOL_SOCKET, socket.SO_REUSEADDR, 1)</text:span></text:p>
            <text:p text:style-name="P9"><text:span text:style-name="T10"><text:s text:c="4"/>servidor.bind((HOST, PORTA))</text:span></text:p>
            <text:p text:style-name="P9"><text:span text:style-name="T10"><text:s text:c="4"/>servidor.listen(10)</text:span></text:p>
            <text:p text:style-name="P9"><text:span text:style-name="T10"><text:s text:c="4"/>print(f"Servidor de sorteio em {HOST}:{PORTA}")</text:span></text:p>
            <text:p text:style-name="P9"><text:span text:style-name="T10"><text:s text:c="4"/>while True:</text:span></text:p>
            <text:p text:style-name="P9"><text:span text:style-name="T10"><text:s text:c="8"/>conexao, endereco = servidor.accept()</text:span></text:p>
            <text:p text:style-name="P9"><text:span text:style-name="T10"><text:s text:c="8"/>threading.Thread(</text:span></text:p>
            <text:p text:style-name="P9"><text:span text:style-name="T10"><text:s text:c="12"/>target=atender_cliente, args=(conexao, endereco), daemon=True</text:span></text:p>
            <text:p text:style-name="P9"><text:span text:style-name="T10"><text:s text:c="8"/>).start()</text:span></text:p>
          </table:table-cell>
        </table:table-row>
      </table:table>
      <text:p text:style-name="P1"/>
      <text:h text:style-name="P7" text:outline-level="2">6.5 Cliente — parâmetros de conexão (host/porta configuráveis)</text:h>
      <table:table table:name="Tabela10" table:style-name="Tabela10">
        <table:table-column table:style-name="Tabela10.A"/>
        <table:table-row table:style-name="Tabela10.1">
          <table:table-cell table:style-name="Tabela10.A1" office:value-type="string">
            <text:p text:style-name="P9"><text:span text:style-name="T10">parser = argparse.ArgumentParser(description="Cliente para o Jogo de Sorteio")</text:span></text:p>
            <text:p text:style-name="P9"><text:span text:style-name="T10">parser.add_argument("--host", default="127.0.0.1",</text:span></text:p>
            <text:p text:style-name="P9"><text:span text:style-name="T10"><text:s text:c="21"/>help="Endereço IP do servidor (padrão: 127.0.0.1)")</text:span></text:p>
            <text:p text:style-name="P9"><text:span text:style-name="T10">parser.add_argument("--porta", type=int, default=5004,</text:span></text:p>
            <text:p text:style-name="P9"><text:span text:style-name="T10"><text:s text:c="21"/>help="Porta do servidor (padrão: 5004)")</text:span></text:p>
            <text:p text:style-name="P9"><text:span text:style-name="T10">args = parser.parse_args()</text:span></text:p>
            <text:p text:style-name="P9"><text:span text:style-name="T10"/></text:p>
            <text:p text:style-name="P9"><text:span text:style-name="T10">with socket.socket(socket.AF_INET, socket.SOCK_STREAM) as cliente:</text:span></text:p>
            <text:p text:style-name="P9"><text:span text:style-name="T10"><text:s text:c="4"/>try:</text:span></text:p>
            <text:p text:style-name="P9"><text:span text:style-name="T10"><text:s text:c="8"/>cliente.connect((args.host, args.porta))</text:span></text:p>
            <text:p text:style-name="P9"><text:span text:style-name="T10"><text:s text:c="4"/>except ConnectionRefusedError:</text:span></text:p>
            <text:p text:style-name="P9"><text:span text:style-name="T10"><text:s text:c="8"/>print(f"Não foi possível conectar ao servidor em {args.host}:{args.porta}.")</text:span></text:p>
            <text:p text:style-name="P9"><text:span text:style-name="T10"><text:s text:c="8"/>return</text:span></text:p>
          </table:table-cell>
        </table:table-row>
      </table:table>
      <text:p text:style-name="P1"/>
      <text:h text:style-name="P7" text:outline-level="2"><text:soft-page-break/>6.6 Cliente — thread de recepção (comunicação full-duplex)</text:h>
      <table:table table:name="Tabela11" table:style-name="Tabela11">
        <table:table-column table:style-name="Tabela11.A"/>
        <table:table-row table:style-name="Tabela11.1">
          <table:table-cell table:style-name="Tabela11.A1" office:value-type="string">
            <text:p text:style-name="P9"><text:span text:style-name="T10">def receber_mensagens(conexao):</text:span></text:p>
            <text:p text:style-name="P9"><text:span text:style-name="T10"><text:s text:c="4"/>while True:</text:span></text:p>
            <text:p text:style-name="P9"><text:span text:style-name="T10"><text:s text:c="8"/>try:</text:span></text:p>
            <text:p text:style-name="P9"><text:span text:style-name="T10"><text:s text:c="12"/>mensagem = conexao.recv(1024).decode("utf-8")</text:span></text:p>
            <text:p text:style-name="P9"><text:span text:style-name="T10"><text:s text:c="12"/>if not mensagem:</text:span></text:p>
            <text:p text:style-name="P9"><text:span text:style-name="T10"><text:s text:c="16"/>print("\n[Conexão encerrada pelo servidor]")</text:span></text:p>
            <text:p text:style-name="P9"><text:span text:style-name="T10"><text:s text:c="16"/>break</text:span></text:p>
            <text:p text:style-name="P9"><text:span text:style-name="T10"><text:s text:c="12"/>print(mensagem, end="")</text:span></text:p>
            <text:p text:style-name="P9"><text:span text:style-name="T10"><text:s text:c="8"/>except OSError:</text:span></text:p>
            <text:p text:style-name="P9"><text:span text:style-name="T10"><text:s text:c="12"/>break</text:span></text:p>
            <text:p text:style-name="P9"><text:span text:style-name="T10"/></text:p>
            <text:p text:style-name="P9"><text:span text:style-name="T10"># ...</text:span></text:p>
            <text:p text:style-name="P9"><text:span text:style-name="T10">thread_receber = threading.Thread(target=receber_mensagens, args=(cliente,))</text:span></text:p>
            <text:p text:style-name="P9"><text:span text:style-name="T10">thread_receber.daemon = True</text:span></text:p>
            <text:p text:style-name="P9"><text:span text:style-name="T10">thread_receber.start()</text:span></text:p>
            <text:p text:style-name="P9"><text:span text:style-name="T10"/></text:p>
            <text:p text:style-name="P9"><text:span text:style-name="T10">try:</text:span></text:p>
            <text:p text:style-name="P9"><text:span text:style-name="T10"><text:s text:c="4"/>while True:</text:span></text:p>
            <text:p text:style-name="P9"><text:span text:style-name="T10"><text:s text:c="8"/>mensagem = input()</text:span></text:p>
            <text:p text:style-name="P9"><text:span text:style-name="T10"><text:s text:c="8"/>if not mensagem:</text:span></text:p>
            <text:p text:style-name="P9"><text:span text:style-name="T10"><text:s text:c="12"/>continue</text:span></text:p>
            <text:p text:style-name="P9"><text:span text:style-name="T10"><text:s text:c="8"/>cliente.sendall(mensagem.encode("utf-8"))</text:span></text:p>
            <text:p text:style-name="P9"><text:span text:style-name="T10"><text:s text:c="8"/>if mensagem.upper() == "/SAIR":</text:span></text:p>
            <text:p text:style-name="P9"><text:span text:style-name="T10"><text:s text:c="12"/>break</text:span></text:p>
            <text:p text:style-name="P9"><text:span text:style-name="T10">except KeyboardInterrupt:</text:span></text:p>
            <text:p text:style-name="P9"><text:span text:style-name="T10"><text:s text:c="4"/>print("\nSaindo...")</text:span></text:p>
            <text:p text:style-name="P9"><text:span text:style-name="T10"><text:s text:c="4"/>cliente.sendall("/SAIR".encode("utf-8"))</text:span></text:p>
          </table:table-cell>
        </table:table-row>
      </table:table>
      <text:p text:style-name="P1"/>
      <text:h text:style-name="P6" text:outline-level="1">7. Testes Realizados e Evidências (itens 10.2 e 10.4)</text:h>
      <text:p text:style-name="P1">Os testes a seguir foram executados em um computador com Ubuntu, com o servidor escutando em 0.0.0.0:5004. O endereço IP da máquina na rede local utilizada nos testes foi 192.168.0.14.</text:p>
      <text:h text:style-name="P7" text:outline-level="2">7.1 Teste 1 — Três clientes conectados simultaneamente</text:h>
      <text:p text:style-name="P1">Para comprovar o suporte a múltiplos clientes simultâneos, três clientes (Alice, Bob e Carla) conectaram-se ao servidor ao mesmo tempo, cada um em sua própria thread, exercitando diferentes fluxos do protocolo: palpites errados, um palpite correto ("Parabéns!"), um comando desconhecido (/AJUDA) e uma entrada inválida ("abc"), além do encerramento via /SAIR.</text:p>
      <text:p text:style-name="P2"><text:span text:style-name="T9">Log do servidor (saída do processo servidor_sorteio.py)</text:span></text:p>
      <table:table table:name="Tabela12" table:style-name="Tabela12">
        <table:table-column table:style-name="Tabela12.A"/>
        <table:table-row table:style-name="Tabela12.1">
          <table:table-cell table:style-name="Tabela12.A1" office:value-type="string">
            <text:p text:style-name="P9"><text:span text:style-name="T10">Servidor de sorteio em 0.0.0.0:5004</text:span></text:p>
            <text:p text:style-name="P9"><text:span text:style-name="T10">&lt;socket.socket fd=4, family=2, type=1, proto=0, laddr=('127.0.0.1', 5004), raddr=('127.0.0.1', 39922)&gt;</text:span></text:p>
            <text:p text:style-name="P9"><text:span text:style-name="T10">[SERVIDOR] Alice entrou no jogo de sorteio.</text:span></text:p>
            <text:p text:style-name="P9"><text:soft-page-break/><text:span text:style-name="T10">&lt;socket.socket fd=5, family=2, type=1, proto=0, laddr=('127.0.0.1', 5004), raddr=('127.0.0.1', 39930)&gt;</text:span></text:p>
            <text:p text:style-name="P9"><text:span text:style-name="T10">[SERVIDOR] Bob entrou no jogo de sorteio.</text:span></text:p>
            <text:p text:style-name="P9"><text:span text:style-name="T10">&lt;socket.socket fd=6, family=2, type=1, proto=0, laddr=('127.0.0.1', 5004), raddr=('127.0.0.1', 39944)&gt;</text:span></text:p>
            <text:p text:style-name="P9"><text:span text:style-name="T10">[Alice] chutou o número 10</text:span></text:p>
            <text:p text:style-name="P9"><text:span text:style-name="T10">[SERVIDOR] Carla entrou no jogo de sorteio.</text:span></text:p>
            <text:p text:style-name="P9"><text:span text:style-name="T10">[Carla] chutou o número 1</text:span></text:p>
            <text:p text:style-name="P9"><text:span text:style-name="T10">[Carla] chutou o número 2</text:span></text:p>
            <text:p text:style-name="P9"><text:span text:style-name="T10">[Carla] chutou o número 3</text:span></text:p>
            <text:p text:style-name="P9"><text:span text:style-name="T10">[Carla] chutou o número 4</text:span></text:p>
            <text:p text:style-name="P9"><text:span text:style-name="T10">[Bob] chutou o número 7</text:span></text:p>
            <text:p text:style-name="P9"><text:span text:style-name="T10">[Carla] chutou o número 5</text:span></text:p>
            <text:p text:style-name="P9"><text:span text:style-name="T10">[Carla] chutou o número 6</text:span></text:p>
            <text:p text:style-name="P9"><text:span text:style-name="T10">[Carla] chutou o número 7</text:span></text:p>
            <text:p text:style-name="P9"><text:span text:style-name="T10">[Carla] chutou o número 8</text:span></text:p>
            <text:p text:style-name="P9"><text:span text:style-name="T10">[Carla] chutou o número 9</text:span></text:p>
            <text:p text:style-name="P9"><text:span text:style-name="T10">[Alice] chutou o número 25</text:span></text:p>
            <text:p text:style-name="P9"><text:span text:style-name="T10">[Carla] chutou o número 10</text:span></text:p>
            <text:p text:style-name="P9"><text:span text:style-name="T10">[Carla] chutou o número 11</text:span></text:p>
            <text:p text:style-name="P9"><text:span text:style-name="T10">[Carla] chutou o número 12</text:span></text:p>
            <text:p text:style-name="P9"><text:span text:style-name="T10">[Carla] chutou o número 13</text:span></text:p>
            <text:p text:style-name="P9"><text:span text:style-name="T10">[Carla] chutou o número 14</text:span></text:p>
            <text:p text:style-name="P9"><text:span text:style-name="T10">[Bob] chutou o número 42</text:span></text:p>
            <text:p text:style-name="P9"><text:span text:style-name="T10">[Carla] chutou o número 15</text:span></text:p>
            <text:p text:style-name="P9"><text:span text:style-name="T10">[Carla] chutou o número 16</text:span></text:p>
            <text:p text:style-name="P9"><text:span text:style-name="T10">[Carla] chutou o número 17</text:span></text:p>
            <text:p text:style-name="P9"><text:span text:style-name="T10">[Carla] chutou o número 18</text:span></text:p>
            <text:p text:style-name="P9"><text:span text:style-name="T10">[SERVIDOR] Carla saiu do jogo.</text:span></text:p>
            <text:p text:style-name="P9"><text:span text:style-name="T10">[Alice] chutou o número 50</text:span></text:p>
            <text:p text:style-name="P9"><text:span text:style-name="T10">[Alice] tentou usar comando desconhecido: /AJUDA</text:span></text:p>
            <text:p text:style-name="P9"><text:span text:style-name="T10">[Alice] enviou entrada inválida: abc</text:span></text:p>
            <text:p text:style-name="P9"><text:span text:style-name="T10">[SERVIDOR] Alice saiu do jogo.</text:span></text:p>
            <text:p text:style-name="P9"><text:span text:style-name="T10">[Bob] chutou o número 88</text:span></text:p>
            <text:p text:style-name="P9"><text:span text:style-name="T10">[Bob] tentou usar comando desconhecido: /AJUDA</text:span></text:p>
            <text:p text:style-name="P9"><text:span text:style-name="T10">[Bob] enviou entrada inválida: abc</text:span></text:p>
            <text:p text:style-name="P9"><text:span text:style-name="T10">[SERVIDOR] Bob saiu do jogo.</text:span></text:p>
          </table:table-cell>
        </table:table-row>
      </table:table>
      <text:p text:style-name="P1"/>
      <text:p text:style-name="P2"><text:span text:style-name="T9">Sessão do Cliente 1 (Alice) — apenas palpites errados, comando desconhecido e entrada inválida</text:span></text:p>
      <table:table table:name="Tabela13" table:style-name="Tabela13">
        <table:table-column table:style-name="Tabela13.A"/>
        <table:table-row table:style-name="Tabela13.1">
          <table:table-cell table:style-name="Tabela13.A1" office:value-type="string">
            <text:p text:style-name="P9"><text:span text:style-name="T10">&gt;&gt;&gt; Conectado ao servidor 127.0.0.1:5004</text:span></text:p>
            <text:p text:style-name="P9"><text:span text:style-name="T10">&lt;&lt;&lt; Digite seu nome:</text:span></text:p>
            <text:p text:style-name="P9"><text:span text:style-name="T10">&gt;&gt;&gt; Alice</text:span></text:p>
            <text:p text:style-name="P9"><text:span text:style-name="T10">&lt;&lt;&lt; Tente adivinhar um dos 5 números sorteados entre 1 e 100! (ou /SAIR para sair)</text:span></text:p>
            <text:p text:style-name="P9"><text:span text:style-name="T10">&gt;&gt;&gt; 10</text:span></text:p>
            <text:p text:style-name="P9"><text:span text:style-name="T10">&lt;&lt;&lt; Você errou! 10 não foi sorteado. Tente novamente.</text:span></text:p>
            <text:p text:style-name="P9"><text:span text:style-name="T10">&gt;&gt;&gt; 25</text:span></text:p>
            <text:p text:style-name="P9"><text:span text:style-name="T10">&lt;&lt;&lt; Você errou! 25 não foi sorteado. Tente novamente.</text:span></text:p>
            <text:p text:style-name="P9"><text:span text:style-name="T10">&gt;&gt;&gt; 50</text:span></text:p>
            <text:p text:style-name="P9"><text:span text:style-name="T10">&lt;&lt;&lt; Você errou! 50 não foi sorteado. Tente novamente.</text:span></text:p>
            <text:p text:style-name="P9"><text:span text:style-name="T10">&gt;&gt;&gt; /AJUDA</text:span></text:p>
            <text:p text:style-name="P9"><text:span text:style-name="T10">&lt;&lt;&lt; Comando desconhecido: /AJUDA. Comando válido: /SAIR</text:span></text:p>
            <text:p text:style-name="P9"><text:span text:style-name="T10">&gt;&gt;&gt; abc</text:span></text:p>
            <text:p text:style-name="P9"><text:span text:style-name="T10">&lt;&lt;&lt; Entrada inválida. Por favor, envie um número inteiro válido ou o comando /SAIR.</text:span></text:p>
            <text:p text:style-name="P9"><text:span text:style-name="T10">&gt;&gt;&gt; /SAIR</text:span></text:p>
          </table:table-cell>
        </table:table-row>
      </table:table>
      <text:p text:style-name="P1"><text:soft-page-break/></text:p>
      <text:p text:style-name="P2"><text:span text:style-name="T9">Sessão do Cliente 2 (Bob) — palpite correto ("Parabéns!"), comando desconhecido e entrada inválida</text:span></text:p>
      <table:table table:name="Tabela14" table:style-name="Tabela14">
        <table:table-column table:style-name="Tabela14.A"/>
        <table:table-row table:style-name="Tabela14.1">
          <table:table-cell table:style-name="Tabela14.A1" office:value-type="string">
            <text:p text:style-name="P9"><text:span text:style-name="T10">&gt;&gt;&gt; Conectado ao servidor 127.0.0.1:5004</text:span></text:p>
            <text:p text:style-name="P9"><text:span text:style-name="T10">&lt;&lt;&lt; Digite seu nome:</text:span></text:p>
            <text:p text:style-name="P9"><text:span text:style-name="T10">&gt;&gt;&gt; Bob</text:span></text:p>
            <text:p text:style-name="P9"><text:span text:style-name="T10">&lt;&lt;&lt; Tente adivinhar um dos 5 números sorteados entre 1 e 100! (ou /SAIR para sair)</text:span></text:p>
            <text:p text:style-name="P9"><text:span text:style-name="T10">&gt;&gt;&gt; 7</text:span></text:p>
            <text:p text:style-name="P9"><text:span text:style-name="T10">&lt;&lt;&lt; Você errou! 7 não foi sorteado. Tente novamente.</text:span></text:p>
            <text:p text:style-name="P9"><text:span text:style-name="T10">&gt;&gt;&gt; 42</text:span></text:p>
            <text:p text:style-name="P9"><text:span text:style-name="T10">&lt;&lt;&lt; Parabéns! Você acertou, 42 é um dos números sorteados!</text:span></text:p>
            <text:p text:style-name="P9"><text:span text:style-name="T10">&gt;&gt;&gt; 88</text:span></text:p>
            <text:p text:style-name="P9"><text:span text:style-name="T10">&lt;&lt;&lt; Você errou! 88 não foi sorteado. Tente novamente.</text:span></text:p>
            <text:p text:style-name="P9"><text:span text:style-name="T10">&gt;&gt;&gt; /AJUDA</text:span></text:p>
            <text:p text:style-name="P9"><text:span text:style-name="T10">&lt;&lt;&lt; Comando desconhecido: /AJUDA. Comando válido: /SAIR</text:span></text:p>
            <text:p text:style-name="P9"><text:span text:style-name="T10">&gt;&gt;&gt; abc</text:span></text:p>
            <text:p text:style-name="P9"><text:span text:style-name="T10">&lt;&lt;&lt; Entrada inválida. Por favor, envie um número inteiro válido ou o comando /SAIR.</text:span></text:p>
            <text:p text:style-name="P9"><text:span text:style-name="T10">&gt;&gt;&gt; /SAIR</text:span></text:p>
          </table:table-cell>
        </table:table-row>
      </table:table>
      <text:p text:style-name="P1"/>
      <text:p text:style-name="P2"><text:span text:style-name="T9">Sessão do Cliente 3 (Carla) — busca sequencial até acertar um número sorteado</text:span></text:p>
      <table:table table:name="Tabela15" table:style-name="Tabela15">
        <table:table-column table:style-name="Tabela15.A"/>
        <table:table-row table:style-name="Tabela15.1">
          <table:table-cell table:style-name="Tabela15.A1" office:value-type="string">
            <text:p text:style-name="P9"><text:span text:style-name="T10">&gt;&gt;&gt; Conectado ao servidor 127.0.0.1:5004</text:span></text:p>
            <text:p text:style-name="P9"><text:span text:style-name="T10">&lt;&lt;&lt; Digite seu nome:</text:span></text:p>
            <text:p text:style-name="P9"><text:span text:style-name="T10">&gt;&gt;&gt; Carla</text:span></text:p>
            <text:p text:style-name="P9"><text:span text:style-name="T10">&lt;&lt;&lt; Tente adivinhar um dos 5 números sorteados entre 1 e 100! (ou /SAIR para sair)</text:span></text:p>
            <text:p text:style-name="P9"><text:span text:style-name="T10">&gt;&gt;&gt; 1</text:span></text:p>
            <text:p text:style-name="P9"><text:span text:style-name="T10">&lt;&lt;&lt; Você errou! 1 não foi sorteado. Tente novamente.</text:span></text:p>
            <text:p text:style-name="P9"><text:span text:style-name="T10">...</text:span></text:p>
            <text:p text:style-name="P9"><text:span text:style-name="T10">&gt;&gt;&gt; 17</text:span></text:p>
            <text:p text:style-name="P9"><text:span text:style-name="T10">&lt;&lt;&lt; Você errou! 17 não foi sorteado. Tente novamente.</text:span></text:p>
            <text:p text:style-name="P9"><text:span text:style-name="T10">&gt;&gt;&gt; 18</text:span></text:p>
            <text:p text:style-name="P9"><text:span text:style-name="T10">&lt;&lt;&lt; Parabéns! Você acertou, 18 é um dos números sorteados!</text:span></text:p>
            <text:p text:style-name="P9"><text:span text:style-name="T10">&gt;&gt;&gt; /SAIR</text:span></text:p>
          </table:table-cell>
        </table:table-row>
      </table:table>
      <text:p text:style-name="P1"/>
      <text:p text:style-name="P1">O log do servidor confirma o atendimento concorrente: as mensagens dos três clientes aparecem intercaladas (ex.: "[Carla] chutou o número 4" seguido de "[Bob] chutou o número 7"), evidenciando que cada conexão é processada em sua própria thread sem bloquear as demais.</text:p>
      <text:h text:style-name="P7" text:outline-level="2">7.2 Teste 2 — Acesso via rede local (não restrito a localhost)</text:h>
      <text:p text:style-name="P1">Para validar o requisito de execução em rede local, o cliente foi executado informando o IP da própria máquina na rede (192.168.0.14), em vez de 127.0.0.1, comprovando que o servidor — que está em escuta em 0.0.0.0 — aceita conexões originadas por qualquer interface de rede e não apenas pela interface de loopback. O comando utilizado foi:</text:p>
      <table:table table:name="Tabela16" table:style-name="Tabela16">
        <table:table-column table:style-name="Tabela16.A"/>
        <text:soft-page-break/>
        <table:table-row table:style-name="Tabela16.1">
          <table:table-cell table:style-name="Tabela16.A1" office:value-type="string">
            <text:p text:style-name="P9"><text:span text:style-name="T10">python3 cliente_sorteio.py --host 192.168.0.14 --porta 5004</text:span></text:p>
          </table:table-cell>
        </table:table-row>
      </table:table>
      <text:p text:style-name="P1"/>
      <text:p text:style-name="P2"><text:span text:style-name="T9">Log do servidor — conexão recebida pelo endereço de rede local</text:span></text:p>
      <table:table table:name="Tabela17" table:style-name="Tabela17">
        <table:table-column table:style-name="Tabela17.A"/>
        <table:table-row table:style-name="Tabela17.1">
          <table:table-cell table:style-name="Tabela17.A1" office:value-type="string">
            <text:p text:style-name="P9"><text:span text:style-name="T10">&lt;socket.socket fd=4, family=2, type=1, proto=0, laddr=('192.168.0.14', 5004), raddr=('192.168.0.14', 34744)&gt;</text:span></text:p>
            <text:p text:style-name="P9"><text:span text:style-name="T10">[SERVIDOR] TesteRede entrou no jogo de sorteio.</text:span></text:p>
            <text:p text:style-name="P9"><text:span text:style-name="T10">[TesteRede] chutou o número 99</text:span></text:p>
            <text:p text:style-name="P9"><text:span text:style-name="T10">[SERVIDOR] TesteRede saiu do jogo.</text:span></text:p>
          </table:table-cell>
        </table:table-row>
      </table:table>
      <text:p text:style-name="P1"/>
      <text:p text:style-name="P2"><text:span text:style-name="T9">Sessão do cliente conectado via IP de rede local</text:span></text:p>
      <table:table table:name="Tabela18" table:style-name="Tabela18">
        <table:table-column table:style-name="Tabela18.A"/>
        <table:table-row table:style-name="Tabela18.1">
          <table:table-cell table:style-name="Tabela18.A1" office:value-type="string">
            <text:p text:style-name="P9"><text:span text:style-name="T10">Conectando ao servidor em 192.168.0.14:5004...</text:span></text:p>
            <text:p text:style-name="P9"><text:span text:style-name="T10">&lt;&lt;&lt; Digite seu nome:</text:span></text:p>
            <text:p text:style-name="P9"><text:span text:style-name="T10">&gt;&gt;&gt; TesteRede</text:span></text:p>
            <text:p text:style-name="P9"><text:span text:style-name="T10">&lt;&lt;&lt; Tente adivinhar um dos 5 números sorteados entre 1 e 100! (ou /SAIR para sair)</text:span></text:p>
            <text:p text:style-name="P9"><text:span text:style-name="T10">&gt;&gt;&gt; 99</text:span></text:p>
            <text:p text:style-name="P9"><text:span text:style-name="T10">&lt;&lt;&lt; Você errou! 99 não foi sorteado. Tente novamente.</text:span></text:p>
            <text:p text:style-name="P9"><text:span text:style-name="T10">&gt;&gt;&gt; /SAIR</text:span></text:p>
            <text:p text:style-name="P9"><text:span text:style-name="T10">&lt;&lt;&lt; [Conexão encerrada pelo servidor]</text:span></text:p>
          </table:table-cell>
        </table:table-row>
      </table:table>
      <text:p text:style-name="P1"/>
      <text:p text:style-name="P1">Em um cenário com duas máquinas físicas distintas na mesma rede, o procedimento seria idêntico: o servidor é executado em uma máquina (escutando em 0.0.0.0:5004) e os clientes, em qualquer outra máquina da rede, executam cliente_sorteio.py --host &lt;IP_DO_SERVIDOR&gt; --porta 5004.</text:p>
      <text:h text:style-name="P6" text:outline-level="1">8. Limitações e Possíveis Melhorias (item 10.2)</text:h>
      <text:h text:style-name="P7" text:outline-level="2">8.1 Limitações observadas</text:h>
      <text:list text:style-name="WWNum5">
        <text:list-item>
          <text:p text:style-name="P12">Protocolo textual simples sem cabeçalhos: por usar apenas texto puro em UTF-8, não há separação formal entre metadados e conteúdo, o que dificulta evoluções futuras (ex.: enviar múltiplos campos de uma vez).</text:p>
        </text:list-item>
        <text:list-item>
          <text:p text:style-name="P12">Ausência de delimitador explícito de mensagens: como o TCP fornece um fluxo contínuo de bytes (sem preservar fronteiras de send()), uma chamada recv() pode, em tese, receber dados de mais de uma mensagem enviada em sequência muito rápida, ou parte de uma mensagem. Na prática, isso não afeta o uso interativo normal (humano digita e aguarda resposta), mas foi observado durante testes automatizados com envios em alta velocidade — reforçando a importância de, em uma versão futura, adotar um delimitador de fim de mensagem (por exemplo, "\n") em ambos os sentidos.</text:p>
        </text:list-item>
        <text:list-item>
          <text:p text:style-name="P12"><text:soft-page-break/>Ausência de criptografia: as mensagens trafegam em texto legível; qualquer ferramenta de captura de tráfego (ex.: Wireshark) na rede local permite visualizar nomes e palpites dos jogadores.</text:p>
        </text:list-item>
        <text:list-item>
          <text:p text:style-name="P12">Uso de locks em estrutura compartilhada: o dicionário global de clientes é protegido por threading.Lock; com um número muito grande de conexões simultâneas, esse ponto pode se tornar um gargalo de concorrência.</text:p>
        </text:list-item>
        <text:list-item>
          <text:p text:style-name="P12">Acoplamento entre cliente e servidor: não existe um código de status/erro estruturado — o cliente apenas exibe literalmente o texto recebido do servidor, o que torna difícil tratar respostas de forma programática.</text:p>
        </text:list-item>
      </text:list>
      <text:h text:style-name="P7" text:outline-level="2">8.2 Possíveis melhorias futuras</text:h>
      <text:list text:continue-numbering="true" text:style-name="WWNum5">
        <text:list-item>
          <text:p text:style-name="P12">Mensagens estruturadas em JSON: substituir o texto livre por mensagens estruturadas (ex.: {"tipo": "chute", "valor": 42}), separadas por quebra de linha, desacoplando a lógica do protocolo da exibição e permitindo extensões (ranking, múltiplas rodadas, etc.).</text:p>
        </text:list-item>
        <text:list-item>
          <text:p text:style-name="P12">Criptografia via TLS/SSL: envolver os sockets com o módulo ssl da biblioteca padrão para proteger a comunicação na rede local.</text:p>
        </text:list-item>
        <text:list-item>
          <text:p text:style-name="P12">I/O assíncrono: substituir o modelo de uma thread por cliente por asyncio, permitindo escalar para um número muito maior de jogadores simultâneos.</text:p>
        </text:list-item>
        <text:list-item>
          <text:p text:style-name="P12">Placar/ranking persistente: registrar quantas tentativas cada jogador levou até acertar e exibir um placar geral a todos os clientes conectados.</text:p>
        </text:list-item>
        <text:list-item>
          <text:p text:style-name="P12">Autenticação simples: exigir, além do nome, uma senha/token para evitar que um jogador assuma o nome de outro em sessões futuras.</text:p>
        </text:list-item>
      </text:list>
      <text:h text:style-name="P6" text:outline-level="1">9. Conclusão</text:h>
      <text:p text:style-name="P1">A atividade integradora permitiu consolidar, em um único projeto prático, os principais conceitos abordados no laboratório de sockets: criação e configuração de sockets TCP, atendimento concorrente de múltiplos clientes com threads e sincronização via locks, definição de um protocolo de aplicação textual próprio (SORTEIO/1.0), tratamento de entradas inválidas e comandos desconhecidos, e execução da aplicação em rede local além do ambiente de localhost.</text:p>
      <text:p text:style-name="P1">Os testes realizados — com três clientes simultâneos e com acesso via o endereço IP da rede local da máquina — demonstraram que o servidor atende corretamente requisições concorrentes, trata corretamente palpites corretos, incorretos, comandos desconhecidos e entradas inválidas, e encerra a sessão de forma adequada tanto em desconexões solicitadas (/SAIR) quanto abruptas.</text:p>
      <text:p text:style-name="P1"><text:soft-page-break/>As limitações identificadas (protocolo sem cabeçalhos estruturados, ausência de delimitador explícito de mensagens e de criptografia) representam oportunidades claras de evolução do projeto, conforme detalhado na Seção 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left" style:justify-single-word="false" fo:orphans="2" fo:widows="2" style:writing-mode="lr-tb"/>
      <style:text-properties style:font-name="Calibri" fo:font-family="Calibri" style:font-family-generic="roman" style:font-pitch="variable" fo:font-size="11pt" style:font-size-asian="11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lef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lef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2</meta:editing-cycles>
    <meta:creation-date>2013-12-23T23:15:00</meta:creation-date>
    <dc:date>2026-06-15T18:12:14.766605835</dc:date>
    <meta:editing-duration>PT6M16S</meta:editing-duration>
    <meta:generator>LibreOffice/26.2.3.2$Linux_X86_64 LibreOffice_project/620$Build-2</meta:generator>
    <meta:document-statistic meta:table-count="18" meta:image-count="0" meta:object-count="0" meta:page-count="15" meta:paragraph-count="346" meta:word-count="3148" meta:character-count="22592" meta:non-whitespace-character-count="18550"/>
    <meta:user-defined meta:name="AppVersion">14.0000</meta:user-defined>
    <meta:template xlink:type="simple" xlink:actuate="onRequest" xlink:title="Normal.dotm" xlink:href=""/>
  </office:meta>
</office:document-meta>
</file>